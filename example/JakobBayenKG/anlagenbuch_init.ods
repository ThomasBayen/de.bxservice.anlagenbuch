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_config">
        <table:table-column table:number-columns-repeated="5"/>
        <table:table-row>
          <table:table-cell office:value-type="string">
            <text:p>Sheet</text:p>
          </table:table-cell>
          <table:table-cell office:value-type="string">
            <text:p>Window</text:p>
          </table:table-cell>
          <table:table-cell office:value-type="string">
            <text:p>Tab</text:p>
          </table:table-cell>
          <table:table-cell office:value-type="string">
            <text:p>ImportMode</text:p>
          </table:table-cell>
          <table:table-cell office:value-type="string">
            <text:p>Skip</text:p>
          </table:table-cell>
        </table:table-row>
        <table:table-row>
          <table:table-cell office:value-type="string">
            <text:p>AssetClass</text:p>
          </table:table-cell>
          <table:table-cell office:value-type="string">
            <text:p>BXS Asset Class</text:p>
          </table:table-cell>
          <table:table-cell office:value-type="string">
            <text:p>BXS Asset Class</text:p>
          </table:table-cell>
          <table:table-cell office:value-type="string">
            <text:p>M</text:p>
          </table:table-cell>
          <table:table-cell office:value-type="string">
            <text:p/>
          </table:table-cell>
        </table:table-row>
        <table:table-row>
          <table:table-cell office:value-type="string">
            <text:p>ScheduleType</text:p>
          </table:table-cell>
          <table:table-cell office:value-type="string">
            <text:p>BXS Schedule Type</text:p>
          </table:table-cell>
          <table:table-cell office:value-type="string">
            <text:p>BXS Schedule Type</text:p>
          </table:table-cell>
          <table:table-cell office:value-type="string">
            <text:p>M</text:p>
          </table:table-cell>
          <table:table-cell office:value-type="string">
            <text:p/>
          </table:table-cell>
        </table:table-row>
        <table:table-row>
          <table:table-cell office:value-type="string">
            <text:p>Asset</text:p>
          </table:table-cell>
          <table:table-cell office:value-type="string">
            <text:p>BXS Asset</text:p>
          </table:table-cell>
          <table:table-cell office:value-type="string">
            <text:p>Asset</text:p>
          </table:table-cell>
          <table:table-cell office:value-type="string">
            <text:p>M</text:p>
          </table:table-cell>
          <table:table-cell office:value-type="string">
            <text:p/>
          </table:table-cell>
        </table:table-row>
      </table:table>
      <table:table table:name="AssetClass">
        <table:table-column table:number-columns-repeated="4"/>
        <table:table-row>
          <table:table-cell office:value-type="string">
            <text:p>Value/K</text:p>
          </table:table-cell>
          <table:table-cell office:value-type="string">
            <text:p>Name</text:p>
          </table:table-cell>
          <table:table-cell office:value-type="string">
            <text:p>Category</text:p>
          </table:table-cell>
          <table:table-cell office:value-type="string">
            <text:p>Description</text:p>
          </table:table-cell>
        </table:table-row>
        <table:table-row>
          <table:table-cell office:value-type="string">
            <text:p>1010</text:p>
          </table:table-cell>
          <table:table-cell office:value-type="string">
            <text:p>LKW</text:p>
          </table:table-cell>
          <table:table-cell office:value-type="string">
            <text:p>Vehicle</text:p>
          </table:table-cell>
          <table:table-cell office:value-type="string">
            <text:p>Lastkraftwagen ab 7,5t zulässiges Gesamtgewicht</text:p>
          </table:table-cell>
        </table:table-row>
        <table:table-row>
          <table:table-cell office:value-type="string">
            <text:p>1020</text:p>
          </table:table-cell>
          <table:table-cell office:value-type="string">
            <text:p>LKW unter 7,5t</text:p>
          </table:table-cell>
          <table:table-cell office:value-type="string">
            <text:p>Vehicle</text:p>
          </table:table-cell>
          <table:table-cell office:value-type="string">
            <text:p>Leichte LKW unter 7,5t — Führerschein Klasse B/C1</text:p>
          </table:table-cell>
        </table:table-row>
        <table:table-row>
          <table:table-cell office:value-type="string">
            <text:p>1030</text:p>
          </table:table-cell>
          <table:table-cell office:value-type="string">
            <text:p>Transporter</text:p>
          </table:table-cell>
          <table:table-cell office:value-type="string">
            <text:p>Vehicle</text:p>
          </table:table-cell>
          <table:table-cell office:value-type="string">
            <text:p>Kastenwagen / Sprinter / E-Transporter</text:p>
          </table:table-cell>
        </table:table-row>
        <table:table-row>
          <table:table-cell office:value-type="string">
            <text:p>1040</text:p>
          </table:table-cell>
          <table:table-cell office:value-type="string">
            <text:p>PKW</text:p>
          </table:table-cell>
          <table:table-cell office:value-type="string">
            <text:p>Vehicle</text:p>
          </table:table-cell>
          <table:table-cell office:value-type="string">
            <text:p>Personenkraftwagen</text:p>
          </table:table-cell>
        </table:table-row>
        <table:table-row>
          <table:table-cell office:value-type="string">
            <text:p>1050</text:p>
          </table:table-cell>
          <table:table-cell office:value-type="string">
            <text:p>Anhänger</text:p>
          </table:table-cell>
          <table:table-cell office:value-type="string">
            <text:p>Vehicle</text:p>
          </table:table-cell>
          <table:table-cell office:value-type="string">
            <text:p>Kühlanhänger und sonstige gezogene Fahrzeuge mit Zulassung</text:p>
          </table:table-cell>
        </table:table-row>
        <table:table-row>
          <table:table-cell office:value-type="string">
            <text:p>3010</text:p>
          </table:table-cell>
          <table:table-cell office:value-type="string">
            <text:p>Stapler</text:p>
          </table:table-cell>
          <table:table-cell office:value-type="string">
            <text:p>Equipment</text:p>
          </table:table-cell>
          <table:table-cell office:value-type="string">
            <text:p>Gabelstapler, betrieblich</text:p>
          </table:table-cell>
        </table:table-row>
        <table:table-row>
          <table:table-cell office:value-type="string">
            <text:p>3020</text:p>
          </table:table-cell>
          <table:table-cell office:value-type="string">
            <text:p>Hubwagen</text:p>
          </table:table-cell>
          <table:table-cell office:value-type="string">
            <text:p>Equipment</text:p>
          </table:table-cell>
          <table:table-cell office:value-type="string">
            <text:p>Hubwagen, Ameise, E-Hubwagen</text:p>
          </table:table-cell>
        </table:table-row>
      </table:table>
      <table:table table:name="ScheduleType">
        <table:table-column table:number-columns-repeated="6"/>
        <table:table-row>
          <table:table-cell office:value-type="string">
            <text:p>Value/K</text:p>
          </table:table-cell>
          <table:table-cell office:value-type="string">
            <text:p>Name</text:p>
          </table:table-cell>
          <table:table-cell office:value-type="string">
            <text:p>BXS_AssetClass_ID[Value]</text:p>
          </table:table-cell>
          <table:table-cell office:value-type="string">
            <text:p>DefaultIntervalMonths</text:p>
          </table:table-cell>
          <table:table-cell office:value-type="string">
            <text:p>IsMandatoryDefault</text:p>
          </table:table-cell>
          <table:table-cell office:value-type="string">
            <text:p>Description</text:p>
          </table:table-cell>
        </table:table-row>
        <table:table-row>
          <table:table-cell office:value-type="string">
            <text:p>TUV</text:p>
          </table:table-cell>
          <table:table-cell office:value-type="string">
            <text:p>TÜV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Y</text:p>
          </table:table-cell>
          <table:table-cell office:value-type="string">
            <text:p>Hauptuntersuchung gem. §29 StVZO. Klasse NULL = gilt für alle (Fahrzeug-Anlagen wählen es manuell aus).</text:p>
          </table:table-cell>
        </table:table-row>
        <table:table-row>
          <table:table-cell office:value-type="string">
            <text:p>SP</text:p>
          </table:table-cell>
          <table:table-cell office:value-type="string">
            <text:p>Sicherheitsprüfung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Y</text:p>
          </table:table-cell>
          <table:table-cell office:value-type="string">
            <text:p>Sicherheitsprüfung gem. §29 StVZO Anlage VIII (LKW ab 7,5t Pflicht). Klasse NULL = alle.</text:p>
          </table:table-cell>
        </table:table-row>
        <table:table-row>
          <table:table-cell office:value-type="string">
            <text:p>UVV</text:p>
          </table:table-cell>
          <table:table-cell office:value-type="string">
            <text:p>UVV-Prüfung</text:p>
          </table:table-cell>
          <table:table-cell office:value-type="string">
            <text:p>3010</text:p>
          </table:table-cell>
          <table:table-cell office:value-type="string">
            <text:p>12</text:p>
          </table:table-cell>
          <table:table-cell office:value-type="string">
            <text:p>Y</text:p>
          </table:table-cell>
          <table:table-cell office:value-type="string">
            <text:p>Unfallverhütungsvorschrift-Prüfung für Stapler</text:p>
          </table:table-cell>
        </table:table-row>
        <table:table-row>
          <table:table-cell office:value-type="string">
            <text:p>INSPECTION</text:p>
          </table:table-cell>
          <table:table-cell office:value-type="string">
            <text:p>Inspektion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N</text:p>
          </table:table-cell>
          <table:table-cell office:value-type="string">
            <text:p>Reguläre Werkstatt-Inspektion (freiwillig, Hersteller-Empfehlung)</text:p>
          </table:table-cell>
        </table:table-row>
        <table:table-row>
          <table:table-cell office:value-type="string">
            <text:p>WARRANTY</text:p>
          </table:table-cell>
          <table:table-cell office:value-type="string">
            <text:p>Garantie-Ablauf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N</text:p>
          </table:table-cell>
          <table:table-cell office:value-type="string">
            <text:p>Garantie-Ablauf-Termin (einmalig, kein Folgetermin)</text:p>
          </table:table-cell>
        </table:table-row>
      </table:table>
      <table:table table:name="Asset">
        <table:table-column table:number-columns-repeated="14"/>
        <table:table-row>
          <table:table-cell office:value-type="string">
            <text:p>Value/K</text:p>
          </table:table-cell>
          <table:table-cell office:value-type="string">
            <text:p>Name</text:p>
          </table:table-cell>
          <table:table-cell office:value-type="string">
            <text:p>BXS_AssetClass_ID[Value]</text:p>
          </table:table-cell>
          <table:table-cell office:value-type="string">
            <text:p>Manufacturer</text:p>
          </table:table-cell>
          <table:table-cell office:value-type="string">
            <text:p>Model</text:p>
          </table:table-cell>
          <table:table-cell office:value-type="string">
            <text:p>AssetStatus</text:p>
          </table:table-cell>
          <table:table-cell office:value-type="string">
            <text:p>Location</text:p>
          </table:table-cell>
          <table:table-cell office:value-type="string">
            <text:p>Description</text:p>
          </table:table-cell>
          <table:table-cell office:value-type="string">
            <text:p>BXS_AssetItem&gt;Type/K</text:p>
          </table:table-cell>
          <table:table-cell office:value-type="string">
            <text:p>BXS_AssetItem&gt;Name/K</text:p>
          </table:table-cell>
          <table:table-cell office:value-type="string">
            <text:p>BXS_AssetItem&gt;Description</text:p>
          </table:table-cell>
          <table:table-cell office:value-type="string">
            <text:p>BXS_AssetItem&gt;ReportedDate</text:p>
          </table:table-cell>
          <table:table-cell office:value-type="string">
            <text:p>BXS_AssetItem&gt;ItemStatus</text:p>
          </table:table-cell>
          <table:table-cell office:value-type="string">
            <text:p>BXS_AssetItem&gt;AD_User_ID[Name]</text:p>
          </table:table-cell>
        </table:table-row>
        <table:table-row>
          <table:table-cell office:value-type="string">
            <text:p>KR-JB 91</text:p>
          </table:table-cell>
          <table:table-cell office:value-type="string">
            <text:p>KR-JB 91</text:p>
          </table:table-cell>
          <table:table-cell office:value-type="string">
            <text:p>1010</text:p>
          </table:table-cell>
          <table:table-cell office:value-type="string">
            <text:p>MAN</text:p>
          </table:table-cell>
          <table:table-cell office:value-type="string">
            <text:p/>
          </table:table-cell>
          <table:table-cell office:value-type="string">
            <text:p>InService</text:p>
          </table:table-cell>
          <table:table-cell office:value-type="string">
            <text:p>Hauptlager</text:p>
          </table:table-cell>
          <table:table-cell office:value-type="string">
            <text:p>10t/18t 15 StPl Kugel/Maul/Drucklu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R JB-160</text:p>
          </table:table-cell>
          <table:table-cell office:value-type="string">
            <text:p>KR JB 160</text:p>
          </table:table-cell>
          <table:table-cell office:value-type="string">
            <text:p>10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ervice</text:p>
          </table:table-cell>
          <table:table-cell office:value-type="string">
            <text:p>Hauptlager</text:p>
          </table:table-cell>
          <table:table-cell office:value-type="string">
            <text:p>6,7t/11,9t 10 StPl Salek</text:p>
          </table:table-cell>
          <table:table-cell office:value-type="string">
            <text:p>Defect</text:p>
          </table:table-cell>
          <table:table-cell office:value-type="string">
            <text:p>Fahrerseite Schloss defekt</text:p>
          </table:table-cell>
          <table:table-cell office:value-type="string">
            <text:p>Tür muss am Fensterrahmen nachgezogen werden, um sie zu öffnen oder zu schließen. Türschloss wahrscheinlich ausgeschlagen oder Tür verzogen. (laut Herrn Steppert)</text:p>
          </table:table-cell>
          <table:table-cell office:value-type="string">
            <text:p>2026-05-08</text:p>
          </table:table-cell>
          <table:table-cell office:value-type="string">
            <text:p>Open</text:p>
          </table:table-cell>
          <table:table-cell office:value-type="string">
            <text:p>Michael Steppert</text:p>
          </table:table-cell>
        </table:table-row>
        <table:table-row>
          <table:table-cell office:value-type="string">
            <text:p>KR JB-19</text:p>
          </table:table-cell>
          <table:table-cell office:value-type="string">
            <text:p>KR JB 19</text:p>
          </table:table-cell>
          <table:table-cell office:value-type="string">
            <text:p>1010</text:p>
          </table:table-cell>
          <table:table-cell office:value-type="string">
            <text:p>MAN</text:p>
          </table:table-cell>
          <table:table-cell office:value-type="string">
            <text:p/>
          </table:table-cell>
          <table:table-cell office:value-type="string">
            <text:p>InService</text:p>
          </table:table-cell>
          <table:table-cell office:value-type="string">
            <text:p>Hauptlager</text:p>
          </table:table-cell>
          <table:table-cell office:value-type="string">
            <text:p>5,6t/11,9t 12 StP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R JB-567</text:p>
          </table:table-cell>
          <table:table-cell office:value-type="string">
            <text:p>KR JB 567</text:p>
          </table:table-cell>
          <table:table-cell office:value-type="string">
            <text:p>10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ervice</text:p>
          </table:table-cell>
          <table:table-cell office:value-type="string">
            <text:p>Hauptlager</text:p>
          </table:table-cell>
          <table:table-cell office:value-type="string">
            <text:p>6,6t/12t 8 StPl Bühne Kugel/12V</text:p>
          </table:table-cell>
          <table:table-cell office:value-type="string">
            <text:p>Defect</text:p>
          </table:table-cell>
          <table:table-cell office:value-type="string">
            <text:p>Ölstandsensor</text:p>
          </table:table-cell>
          <table:table-cell office:value-type="string">
            <text:p>Ölstandsensor kaputt oder vielleicht starker Ölverlust. Ölwechsel und Reinigung oder Austausch des Sensors nötig. (laut Herrn Steppert)</text:p>
          </table:table-cell>
          <table:table-cell office:value-type="string">
            <text:p>2026-05-08</text:p>
          </table:table-cell>
          <table:table-cell office:value-type="string">
            <text:p>Open</text:p>
          </table:table-cell>
          <table:table-cell office:value-type="string">
            <text:p>Michael Steppert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fect</text:p>
          </table:table-cell>
          <table:table-cell office:value-type="string">
            <text:p>Digitaler Tacho</text:p>
          </table:table-cell>
          <table:table-cell office:value-type="string">
            <text:p>Gerät schmeißt oft die Karte raus, auch unterwegs. Bisher nur Meldung von Herrn Steppert. Könnte das auch an der Karte liegen?</text:p>
          </table:table-cell>
          <table:table-cell office:value-type="string">
            <text:p>2026-05-08</text:p>
          </table:table-cell>
          <table:table-cell office:value-type="string">
            <text:p>Open</text:p>
          </table:table-cell>
          <table:table-cell office:value-type="string">
            <text:p>Michael Steppert</text:p>
          </table:table-cell>
        </table:table-row>
        <table:table-row>
          <table:table-cell office:value-type="string">
            <text:p>KR JB-1002</text:p>
          </table:table-cell>
          <table:table-cell office:value-type="string">
            <text:p>KR JB-1002</text:p>
          </table:table-cell>
          <table:table-cell office:value-type="string">
            <text:p>10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ervice</text:p>
          </table:table-cell>
          <table:table-cell office:value-type="string">
            <text:p>Hauptlager</text:p>
          </table:table-cell>
          <table:table-cell office:value-type="string">
            <text:p>6,66t/12t 10 StPl 12V Kug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R JB-1359</text:p>
          </table:table-cell>
          <table:table-cell office:value-type="string">
            <text:p>KR JB 1359</text:p>
          </table:table-cell>
          <table:table-cell office:value-type="string">
            <text:p>10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ervice</text:p>
          </table:table-cell>
          <table:table-cell office:value-type="string">
            <text:p>Hauptlager</text:p>
          </table:table-cell>
          <table:table-cell office:value-type="string">
            <text:p>6,8t/12t 12V Kugel+Maul 8 StPl // Stromversorgung für Anhänger deaktiviert</text:p>
          </table:table-cell>
          <table:table-cell office:value-type="string">
            <text:p>Status</text:p>
          </table:table-cell>
          <table:table-cell office:value-type="string">
            <text:p>Getriebe undicht</text:p>
          </table:table-cell>
          <table:table-cell office:value-type="string">
            <text:p>Sollte nur vorsichtig gefahren werden. Kann irgendwann spontan stehenbleiben. Chef sollte nochmal mit der Werkstatt reden. (laut Herrn Steppert)</text:p>
          </table:table-cell>
          <table:table-cell office:value-type="string">
            <text:p>2026-05-08</text:p>
          </table:table-cell>
          <table:table-cell office:value-type="string">
            <text:p>Open</text:p>
          </table:table-cell>
          <table:table-cell office:value-type="string">
            <text:p>Michael Steppert</text:p>
          </table:table-cell>
        </table:table-row>
        <table:table-row>
          <table:table-cell office:value-type="string">
            <text:p>KR JB-1005</text:p>
          </table:table-cell>
          <table:table-cell office:value-type="string">
            <text:p>KR JB 1005</text:p>
          </table:table-cell>
          <table:table-cell office:value-type="string">
            <text:p>1020</text:p>
          </table:table-cell>
          <table:table-cell office:value-type="string">
            <text:p>Iveco</text:p>
          </table:table-cell>
          <table:table-cell office:value-type="string">
            <text:p>Daily Erdgas</text:p>
          </table:table-cell>
          <table:table-cell office:value-type="string">
            <text:p>InService</text:p>
          </table:table-cell>
          <table:table-cell office:value-type="string">
            <text:p>Hauptlager</text:p>
          </table:table-cell>
          <table:table-cell office:value-type="string">
            <text:p>3,2t/7,2t 12V 6 StPl Kugel</text:p>
          </table:table-cell>
          <table:table-cell office:value-type="string">
            <text:p>Defect</text:p>
          </table:table-cell>
          <table:table-cell office:value-type="string">
            <text:p>Seil gerissen</text:p>
          </table:table-cell>
          <table:table-cell office:value-type="string">
            <text:p>Rechte Klappe darf nicht mehr geöffnet werden, fällt womöglich raus. Muss bei Etz Bierewirtz gemacht werden — kann Doc Brummi nicht. (laut Herrn Steppert)</text:p>
          </table:table-cell>
          <table:table-cell office:value-type="string">
            <text:p>2026-05-08</text:p>
          </table:table-cell>
          <table:table-cell office:value-type="string">
            <text:p>Open</text:p>
          </table:table-cell>
          <table:table-cell office:value-type="string">
            <text:p>Michael Steppert</text:p>
          </table:table-cell>
        </table:table-row>
        <table:table-row>
          <table:table-cell office:value-type="string">
            <text:p>KR-J 98E</text:p>
          </table:table-cell>
          <table:table-cell office:value-type="string">
            <text:p>KR-J 98E</text:p>
          </table:table-cell>
          <table:table-cell office:value-type="string">
            <text:p>1030</text:p>
          </table:table-cell>
          <table:table-cell office:value-type="string">
            <text:p>Maxus</text:p>
          </table:table-cell>
          <table:table-cell office:value-type="string">
            <text:p/>
          </table:table-cell>
          <table:table-cell office:value-type="string">
            <text:p>OutOfService</text:p>
          </table:table-cell>
          <table:table-cell office:value-type="string">
            <text:p>Hauptlager</text:p>
          </table:table-cell>
          <table:table-cell office:value-type="string">
            <text:p>1,0t/3,5t Kugel 190km</text:p>
          </table:table-cell>
          <table:table-cell office:value-type="string">
            <text:p>Defect</text:p>
          </table:table-cell>
          <table:table-cell office:value-type="string">
            <text:p>fährt nicht</text:p>
          </table:table-cell>
          <table:table-cell office:value-type="string">
            <text:p>Fahrzeug blieb während der Fahrt stehen und springt nicht mehr an. Steht seit 28.3.26 bei Dittmar &amp; Stachowiak GmbH zur Reparatur (Elsa-Brändström-Str. 23-27, 44795 Bochum, +49 234 5798990).</text:p>
          </table:table-cell>
          <table:table-cell office:value-type="string">
            <text:p>2026-05-08</text:p>
          </table:table-cell>
          <table:table-cell office:value-type="string">
            <text:p>Open</text:p>
          </table:table-cell>
          <table:table-cell office:value-type="string">
            <text:p>Michael Steppert</text:p>
          </table:table-cell>
        </table:table-row>
        <table:table-row>
          <table:table-cell office:value-type="string">
            <text:p>KR-JB 1016</text:p>
          </table:table-cell>
          <table:table-cell office:value-type="string">
            <text:p>KR JB 1016</text:p>
          </table:table-cell>
          <table:table-cell office:value-type="string">
            <text:p>1030</text:p>
          </table:table-cell>
          <table:table-cell office:value-type="string">
            <text:p>VW</text:p>
          </table:table-cell>
          <table:table-cell office:value-type="string">
            <text:p>Bus Elektro</text:p>
          </table:table-cell>
          <table:table-cell office:value-type="string">
            <text:p>InService</text:p>
          </table:table-cell>
          <table:table-cell office:value-type="string">
            <text:p>Hauptlager</text:p>
          </table:table-cell>
          <table:table-cell office:value-type="string">
            <text:p>1,0t/2,8t 100k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R JB 103E</text:p>
          </table:table-cell>
          <table:table-cell office:value-type="string">
            <text:p>KR JB 103E</text:p>
          </table:table-cell>
          <table:table-cell office:value-type="string">
            <text:p>1030</text:p>
          </table:table-cell>
          <table:table-cell office:value-type="string">
            <text:p>VW</text:p>
          </table:table-cell>
          <table:table-cell office:value-type="string">
            <text:p>eCrafter</text:p>
          </table:table-cell>
          <table:table-cell office:value-type="string">
            <text:p>InService</text:p>
          </table:table-cell>
          <table:table-cell office:value-type="string">
            <text:p>Hauptlager</text:p>
          </table:table-cell>
          <table:table-cell office:value-type="string">
            <text:p>1,1t/3,5t Schaap 140k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R-JB 397E</text:p>
          </table:table-cell>
          <table:table-cell office:value-type="string">
            <text:p>KR JB 397E</text:p>
          </table:table-cell>
          <table:table-cell office:value-type="string">
            <text:p>1030</text:p>
          </table:table-cell>
          <table:table-cell office:value-type="string">
            <text:p>Maxus</text:p>
          </table:table-cell>
          <table:table-cell office:value-type="string">
            <text:p/>
          </table:table-cell>
          <table:table-cell office:value-type="string">
            <text:p>InService</text:p>
          </table:table-cell>
          <table:table-cell office:value-type="string">
            <text:p>Hauptlager</text:p>
          </table:table-cell>
          <table:table-cell office:value-type="string">
            <text:p>1,0t/3,5t 190k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R-JB 4444</text:p>
          </table:table-cell>
          <table:table-cell office:value-type="string">
            <text:p>KR-JB 4444</text:p>
          </table:table-cell>
          <table:table-cell office:value-type="string">
            <text:p>10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ervice</text:p>
          </table:table-cell>
          <table:table-cell office:value-type="string">
            <text:p>Hauptlager</text:p>
          </table:table-cell>
          <table:table-cell office:value-type="string">
            <text:p>Kühlanhänger kl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pler 1</text:p>
          </table:table-cell>
          <table:table-cell office:value-type="string">
            <text:p>Stapler 1</text:p>
          </table:table-cell>
          <table:table-cell office:value-type="string">
            <text:p>30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ervice</text:p>
          </table:table-cell>
          <table:table-cell office:value-type="string">
            <text:p>Halle 1</text:p>
          </table:table-cell>
          <table:table-cell office:value-type="string">
            <text:p>Internes Gerät ohne Kennzeich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pler 2</text:p>
          </table:table-cell>
          <table:table-cell office:value-type="string">
            <text:p>Stapler 2</text:p>
          </table:table-cell>
          <table:table-cell office:value-type="string">
            <text:p>30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ervice</text:p>
          </table:table-cell>
          <table:table-cell office:value-type="string">
            <text:p>Halle 2</text:p>
          </table:table-cell>
          <table:table-cell office:value-type="string">
            <text:p>Internes Gerät ohne Kennzeich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-Hubwagen</text:p>
          </table:table-cell>
          <table:table-cell office:value-type="string">
            <text:p>E-Hubwagen</text:p>
          </table:table-cell>
          <table:table-cell office:value-type="string">
            <text:p>3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ervice</text:p>
          </table:table-cell>
          <table:table-cell office:value-type="string">
            <text:p>Hauptlager</text:p>
          </table:table-cell>
          <table:table-cell office:value-type="string">
            <text:p>Internes Gerät ohne Kennzeich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2</meta:generator>
  </office:meta>
</office:document-meta>
</file>