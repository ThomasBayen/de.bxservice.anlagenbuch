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_config">
        <table:table-column table:number-columns-repeated="5"/>
        <table:table-row>
          <table:table-cell office:value-type="string">
            <text:p>Sheet</text:p>
          </table:table-cell>
          <table:table-cell office:value-type="string">
            <text:p>Window</text:p>
          </table:table-cell>
          <table:table-cell office:value-type="string">
            <text:p>Tab</text:p>
          </table:table-cell>
          <table:table-cell office:value-type="string">
            <text:p>ImportMode</text:p>
          </table:table-cell>
          <table:table-cell office:value-type="string">
            <text:p>Skip</text:p>
          </table:table-cell>
        </table:table-row>
        <table:table-row>
          <table:table-cell office:value-type="string">
            <text:p>BusinessPartner</text:p>
          </table:table-cell>
          <table:table-cell office:value-type="string">
            <text:p>Business Partner</text:p>
          </table:table-cell>
          <table:table-cell office:value-type="string">
            <text:p>Business Partner</text:p>
          </table:table-cell>
          <table:table-cell office:value-type="string">
            <text:p>U</text:p>
          </table:table-cell>
          <table:table-cell office:value-type="string">
            <text:p/>
          </table:table-cell>
        </table:table-row>
        <table:table-row>
          <table:table-cell office:value-type="string">
            <text:p>AssetClass</text:p>
          </table:table-cell>
          <table:table-cell office:value-type="string">
            <text:p>BXS Asset Class</text:p>
          </table:table-cell>
          <table:table-cell office:value-type="string">
            <text:p>BXS Asset Class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  <table:table-row>
          <table:table-cell office:value-type="string">
            <text:p>ScheduleType</text:p>
          </table:table-cell>
          <table:table-cell office:value-type="string">
            <text:p>BXS Schedule Type</text:p>
          </table:table-cell>
          <table:table-cell office:value-type="string">
            <text:p>BXS Schedule Type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  <table:table-row>
          <table:table-cell office:value-type="string">
            <text:p>Asset</text:p>
          </table:table-cell>
          <table:table-cell office:value-type="string">
            <text:p>BXS Asset</text:p>
          </table:table-cell>
          <table:table-cell office:value-type="string">
            <text:p>Asset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  <table:table-row>
          <table:table-cell office:value-type="string">
            <text:p>WorkOrder</text:p>
          </table:table-cell>
          <table:table-cell office:value-type="string">
            <text:p>BXS Work Order</text:p>
          </table:table-cell>
          <table:table-cell office:value-type="string">
            <text:p>WorkOrder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</table:table>
      <table:table table:name="BusinessPartner">
        <table:table-column table:number-columns-repeated="3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IsEmployee</text:p>
          </table:table-cell>
        </table:table-row>
        <table:table-row>
          <table:table-cell office:value-type="string">
            <text:p>TreeFarm</text:p>
          </table:table-cell>
          <table:table-cell office:value-type="string">
            <text:p>Tree Farm Inc.</text:p>
          </table:table-cell>
          <table:table-cell office:value-type="string">
            <text:p>Y</text:p>
          </table:table-cell>
        </table:table-row>
        <table:table-row>
          <table:table-cell office:value-type="string">
            <text:p>C&amp;W</text:p>
          </table:table-cell>
          <table:table-cell office:value-type="string">
            <text:p>C&amp;W Construction</text:p>
          </table:table-cell>
          <table:table-cell office:value-type="string">
            <text:p>Y</text:p>
          </table:table-cell>
        </table:table-row>
        <table:table-row>
          <table:table-cell office:value-type="string">
            <text:p>SeedFarm</text:p>
          </table:table-cell>
          <table:table-cell office:value-type="string">
            <text:p>Seed Farm Inc.</text:p>
          </table:table-cell>
          <table:table-cell office:value-type="string">
            <text:p>Y</text:p>
          </table:table-cell>
        </table:table-row>
      </table:table>
      <table:table table:name="AssetClass">
        <table:table-column table:number-columns-repeated="4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1100</text:p>
          </table:table-cell>
          <table:table-cell office:value-type="string">
            <text:p>Pickup</text:p>
          </table:table-cell>
          <table:table-cell office:value-type="string">
            <text:p>Vehicle</text:p>
          </table:table-cell>
          <table:table-cell office:value-type="string">
            <text:p>Pickup truck for material transport</text:p>
          </table:table-cell>
        </table:table-row>
        <table:table-row>
          <table:table-cell office:value-type="string">
            <text:p>1200</text:p>
          </table:table-cell>
          <table:table-cell office:value-type="string">
            <text:p>Trailer</text:p>
          </table:table-cell>
          <table:table-cell office:value-type="string">
            <text:p>Vehicle</text:p>
          </table:table-cell>
          <table:table-cell office:value-type="string">
            <text:p>Equipment trailer, registration required</text:p>
          </table:table-cell>
        </table:table-row>
        <table:table-row>
          <table:table-cell office:value-type="string">
            <text:p>2100</text:p>
          </table:table-cell>
          <table:table-cell office:value-type="string">
            <text:p>Lawn Mower</text:p>
          </table:table-cell>
          <table:table-cell office:value-type="string">
            <text:p>Equipment</text:p>
          </table:table-cell>
          <table:table-cell office:value-type="string">
            <text:p>Ride-on and walk-behind lawn mowers</text:p>
          </table:table-cell>
        </table:table-row>
        <table:table-row>
          <table:table-cell office:value-type="string">
            <text:p>2200</text:p>
          </table:table-cell>
          <table:table-cell office:value-type="string">
            <text:p>Power Tool</text:p>
          </table:table-cell>
          <table:table-cell office:value-type="string">
            <text:p>Equipment</text:p>
          </table:table-cell>
          <table:table-cell office:value-type="string">
            <text:p>Engine-driven hand tools (chainsaw, hedge trimmer, leaf blower)</text:p>
          </table:table-cell>
        </table:table-row>
        <table:table-row>
          <table:table-cell office:value-type="string">
            <text:p>2300</text:p>
          </table:table-cell>
          <table:table-cell office:value-type="string">
            <text:p>Workshop Tool</text:p>
          </table:table-cell>
          <table:table-cell office:value-type="string">
            <text:p>Equipment</text:p>
          </table:table-cell>
          <table:table-cell office:value-type="string">
            <text:p>Stationary workshop equipment (welder, pressure washer)</text:p>
          </table:table-cell>
        </table:table-row>
        <table:table-row>
          <table:table-cell office:value-type="string">
            <text:p>3100</text:p>
          </table:table-cell>
          <table:table-cell office:value-type="string">
            <text:p>Irrigation Pump</text:p>
          </table:table-cell>
          <table:table-cell office:value-type="string">
            <text:p>Stationary</text:p>
          </table:table-cell>
          <table:table-cell office:value-type="string">
            <text:p>Fixed pump for irrigation systems</text:p>
          </table:table-cell>
        </table:table-row>
        <table:table-row>
          <table:table-cell office:value-type="string">
            <text:p>5100</text:p>
          </table:table-cell>
          <table:table-cell office:value-type="string">
            <text:p>Shed</text:p>
          </table:table-cell>
          <table:table-cell office:value-type="string">
            <text:p>Building</text:p>
          </table:table-cell>
          <table:table-cell office:value-type="string">
            <text:p>Tool shed, permanently installed</text:p>
          </table:table-cell>
        </table:table-row>
      </table:table>
      <table:table table:name="ScheduleType">
        <table:table-column table:number-columns-repeated="6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BXS_AssetClass_ID[Value]</text:p>
          </table:table-cell>
          <table:table-cell office:value-type="string">
            <text:p>DefaultIntervalMonths</text:p>
          </table:table-cell>
          <table:table-cell office:value-type="string">
            <text:p>IsMandatoryDefault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ANNUAL_SERVICE</text:p>
          </table:table-cell>
          <table:table-cell office:value-type="string">
            <text:p>Annual Service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N</text:p>
          </table:table-cell>
          <table:table-cell office:value-type="string">
            <text:p>Regular manufacturer-recommended service (mowers, pumps, power tools)</text:p>
          </table:table-cell>
        </table:table-row>
        <table:table-row>
          <table:table-cell office:value-type="string">
            <text:p>SAFETY</text:p>
          </table:table-cell>
          <table:table-cell office:value-type="string">
            <text:p>Annual Safety Check</text:p>
          </table:table-cell>
          <table:table-cell office:value-type="string">
            <text:p>2200</text:p>
          </table:table-cell>
          <table:table-cell office:value-type="string">
            <text:p>12</text:p>
          </table:table-cell>
          <table:table-cell office:value-type="string">
            <text:p>Y</text:p>
          </table:table-cell>
          <table:table-cell office:value-type="string">
            <text:p>Annual safety inspection (DGUV regulation 3) for engine-driven hand tools</text:p>
          </table:table-cell>
        </table:table-row>
        <table:table-row>
          <table:table-cell office:value-type="string">
            <text:p>FIREEXT</text:p>
          </table:table-cell>
          <table:table-cell office:value-type="string">
            <text:p>Fire-Safety Inspection</text:p>
          </table:table-cell>
          <table:table-cell office:value-type="string">
            <text:p>5100</text:p>
          </table:table-cell>
          <table:table-cell office:value-type="string">
            <text:p>12</text:p>
          </table:table-cell>
          <table:table-cell office:value-type="string">
            <text:p>Y</text:p>
          </table:table-cell>
          <table:table-cell office:value-type="string">
            <text:p>Annual visual inspection of fire extinguishers and emergency exits in sheds</text:p>
          </table:table-cell>
        </table:table-row>
        <table:table-row>
          <table:table-cell office:value-type="string">
            <text:p>PUMP_SERVICE</text:p>
          </table:table-cell>
          <table:table-cell office:value-type="string">
            <text:p>Pump Service</text:p>
          </table:table-cell>
          <table:table-cell office:value-type="string">
            <text:p>3100</text:p>
          </table:table-cell>
          <table:table-cell office:value-type="string">
            <text:p>12</text:p>
          </table:table-cell>
          <table:table-cell office:value-type="string">
            <text:p>N</text:p>
          </table:table-cell>
          <table:table-cell office:value-type="string">
            <text:p>Filter change and pressure check for irrigation pumps</text:p>
          </table:table-cell>
        </table:table-row>
      </table:table>
      <table:table table:name="Asset">
        <table:table-column table:number-columns-repeated="20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BXS_AssetClass_ID[Value]</text:p>
          </table:table-cell>
          <table:table-cell office:value-type="string">
            <text:p>Manufacturer</text:p>
          </table:table-cell>
          <table:table-cell office:value-type="string">
            <text:p>Model</text:p>
          </table:table-cell>
          <table:table-cell office:value-type="string">
            <text:p>SerialNo</text:p>
          </table:table-cell>
          <table:table-cell office:value-type="string">
            <text:p>AssetStatus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BXS_AssetItem&gt;Type/K</text:p>
          </table:table-cell>
          <table:table-cell office:value-type="string">
            <text:p>BXS_AssetItem&gt;Name/K</text:p>
          </table:table-cell>
          <table:table-cell office:value-type="string">
            <text:p>BXS_AssetItem&gt;Description</text:p>
          </table:table-cell>
          <table:table-cell office:value-type="string">
            <text:p>BXS_AssetItem&gt;Priority</text:p>
          </table:table-cell>
          <table:table-cell office:value-type="string">
            <text:p>BXS_AssetItem&gt;ReportedDate</text:p>
          </table:table-cell>
          <table:table-cell office:value-type="string">
            <text:p>BXS_AssetItem&gt;DueDate</text:p>
          </table:table-cell>
          <table:table-cell office:value-type="string">
            <text:p>BXS_AssetItem&gt;CompletionDate</text:p>
          </table:table-cell>
          <table:table-cell office:value-type="string">
            <text:p>BXS_AssetItem&gt;ItemStatus</text:p>
          </table:table-cell>
          <table:table-cell office:value-type="string">
            <text:p>BXS_AssetItem&gt;BXS_ScheduleType_ID[Value]</text:p>
          </table:table-cell>
          <table:table-cell office:value-type="string">
            <text:p>BXS_AssetItem&gt;MeterReading</text:p>
          </table:table-cell>
          <table:table-cell office:value-type="string">
            <text:p>BXS_AssetItem&gt;AD_User_ID[Name]</text:p>
          </table:table-cell>
        </table:table-row>
        <table:table-row>
          <table:table-cell office:value-type="string">
            <text:p>MOWER-01</text:p>
          </table:table-cell>
          <table:table-cell office:value-type="string">
            <text:p>Ride-on Mower North</text:p>
          </table:table-cell>
          <table:table-cell office:value-type="string">
            <text:p>2100</text:p>
          </table:table-cell>
          <table:table-cell office:value-type="string">
            <text:p>John Deere</text:p>
          </table:table-cell>
          <table:table-cell office:value-type="string">
            <text:p>X350</text:p>
          </table:table-cell>
          <table:table-cell office:value-type="string">
            <text:p>JD-X350-0142</text:p>
          </table:table-cell>
          <table:table-cell office:value-type="string">
            <text:p>InService</text:p>
          </table:table-cell>
          <table:table-cell office:value-type="string">
            <text:p>Main Grounds</text:p>
          </table:table-cell>
          <table:table-cell office:value-type="string">
            <text:p>Mowing the meadows north of HQ</text:p>
          </table:table-cell>
          <table:table-cell office:value-type="string">
            <text:p>Status</text:p>
          </table:table-cell>
          <table:table-cell office:value-type="string">
            <text:p>MOWER-01: Initial intake</text:p>
          </table:table-cell>
          <table:table-cell office:value-type="string">
            <text:p>Mower taken into the fleet, visual check OK, hour-meter noted.</text:p>
          </table:table-cell>
          <table:table-cell office:value-type="string">
            <text:p/>
          </table:table-cell>
          <table:table-cell office:value-type="string">
            <text:p>2024-04-01</text:p>
          </table:table-cell>
          <table:table-cell office:value-type="string">
            <text:p/>
          </table:table-cell>
          <table:table-cell office:value-type="string">
            <text:p>2024-04-01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>180</text:p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MOWER-01: Mower deck won't raise</text:p>
          </table:table-cell>
          <table:table-cell office:value-type="string">
            <text:p>Hydraulic lift on the deck does not respond. Likely a blocked hydraulic line.</text:p>
          </table:table-cell>
          <table:table-cell office:value-type="string">
            <text:p>High</text:p>
          </table:table-cell>
          <table:table-cell office:value-type="string">
            <text:p>2026-05-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>220</text:p>
          </table:table-cell>
          <table:table-cell office:value-type="string">
            <text:p>Joe Sal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MOWER-01: Seat switch bouncing</text:p>
          </table:table-cell>
          <table:table-cell office:value-type="string">
            <text:p>Mower cuts out briefly when crossing bumps. Check seat contact.</text:p>
          </table:table-cell>
          <table:table-cell office:value-type="string">
            <text:p>Low</text:p>
          </table:table-cell>
          <table:table-cell office:value-type="string">
            <text:p>2026-05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>225</text:p>
          </table:table-cell>
          <table:table-cell office:value-type="string">
            <text:p>Joe Sales</text:p>
          </table:table-cell>
        </table:table-row>
        <table:table-row>
          <table:table-cell office:value-type="string">
            <text:p>MOWER-02</text:p>
          </table:table-cell>
          <table:table-cell office:value-type="string">
            <text:p>Ride-on Mower South</text:p>
          </table:table-cell>
          <table:table-cell office:value-type="string">
            <text:p>2100</text:p>
          </table:table-cell>
          <table:table-cell office:value-type="string">
            <text:p>Husqvarna</text:p>
          </table:table-cell>
          <table:table-cell office:value-type="string">
            <text:p>R420 TS AWD</text:p>
          </table:table-cell>
          <table:table-cell office:value-type="string">
            <text:p>HQV-R420-0089</text:p>
          </table:table-cell>
          <table:table-cell office:value-type="string">
            <text:p>InService</text:p>
          </table:table-cell>
          <table:table-cell office:value-type="string">
            <text:p>Main Grounds</text:p>
          </table:table-cell>
          <table:table-cell office:value-type="string">
            <text:p>Mowing the south slope</text:p>
          </table:table-cell>
          <table:table-cell office:value-type="string">
            <text:p>Status</text:p>
          </table:table-cell>
          <table:table-cell office:value-type="string">
            <text:p>MOWER-02: Initial intake</text:p>
          </table:table-cell>
          <table:table-cell office:value-type="string">
            <text:p>Mower taken into the fleet, minor paint scratches on deck recorded.</text:p>
          </table:table-cell>
          <table:table-cell office:value-type="string">
            <text:p/>
          </table:table-cell>
          <table:table-cell office:value-type="string">
            <text:p>2024-05-15</text:p>
          </table:table-cell>
          <table:table-cell office:value-type="string">
            <text:p/>
          </table:table-cell>
          <table:table-cell office:value-type="string">
            <text:p>2024-05-15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>120</text:p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MOWER-02: Uneven mowing result</text:p>
          </table:table-cell>
          <table:table-cell office:value-type="string">
            <text:p>Streaks on the right — likely a blade is dull or the belt is loose.</text:p>
          </table:table-cell>
          <table:table-cell office:value-type="string">
            <text:p>Medium</text:p>
          </table:table-cell>
          <table:table-cell office:value-type="string">
            <text:p>2026-05-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>310</text:p>
          </table:table-cell>
          <table:table-cell office:value-type="string">
            <text:p>Henry Seed</text:p>
          </table:table-cell>
        </table:table-row>
        <table:table-row>
          <table:table-cell office:value-type="string">
            <text:p>MOWER-03</text:p>
          </table:table-cell>
          <table:table-cell office:value-type="string">
            <text:p>Ride-on Mower Park</text:p>
          </table:table-cell>
          <table:table-cell office:value-type="string">
            <text:p>2100</text:p>
          </table:table-cell>
          <table:table-cell office:value-type="string">
            <text:p>Stiga</text:p>
          </table:table-cell>
          <table:table-cell office:value-type="string">
            <text:p>Estate 7102 HWSY</text:p>
          </table:table-cell>
          <table:table-cell office:value-type="string">
            <text:p>STG-EST7102-0314</text:p>
          </table:table-cell>
          <table:table-cell office:value-type="string">
            <text:p>InService</text:p>
          </table:table-cell>
          <table:table-cell office:value-type="string">
            <text:p>City Park</text:p>
          </table:table-cell>
          <table:table-cell office:value-type="string">
            <text:p>In service for the municipal park lawns</text:p>
          </table:table-cell>
          <table:table-cell office:value-type="string">
            <text:p>Status</text:p>
          </table:table-cell>
          <table:table-cell office:value-type="string">
            <text:p>MOWER-03: Initial intake</text:p>
          </table:table-cell>
          <table:table-cell office:value-type="string">
            <text:p>New machine accepted from dealer.</text:p>
          </table:table-cell>
          <table:table-cell office:value-type="string">
            <text:p/>
          </table:table-cell>
          <table:table-cell office:value-type="string">
            <text:p>2026-03-02</text:p>
          </table:table-cell>
          <table:table-cell office:value-type="string">
            <text:p/>
          </table:table-cell>
          <table:table-cell office:value-type="string">
            <text:p>2026-03-02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Carl Bos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MOWER-03: Stiff steering</text:p>
          </table:table-cell>
          <table:table-cell office:value-type="string">
            <text:p>Steering wheel is hard to turn, especially at standstill. Steering head bearing?</text:p>
          </table:table-cell>
          <table:table-cell office:value-type="string">
            <text:p>Medium</text:p>
          </table:table-cell>
          <table:table-cell office:value-type="string">
            <text:p>2026-05-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>42</text:p>
          </table:table-cell>
          <table:table-cell office:value-type="string">
            <text:p>Carl Boss</text:p>
          </table:table-cell>
        </table:table-row>
        <table:table-row>
          <table:table-cell office:value-type="string">
            <text:p>MOWER-04</text:p>
          </table:table-cell>
          <table:table-cell office:value-type="string">
            <text:p>Walk-behind Mower Beds</text:p>
          </table:table-cell>
          <table:table-cell office:value-type="string">
            <text:p>2100</text:p>
          </table:table-cell>
          <table:table-cell office:value-type="string">
            <text:p>Honda</text:p>
          </table:table-cell>
          <table:table-cell office:value-type="string">
            <text:p>HRX 537 VK</text:p>
          </table:table-cell>
          <table:table-cell office:value-type="string">
            <text:p>HND-HRX537-0612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Hand-guided mower for tight bed edges</text:p>
          </table:table-cell>
          <table:table-cell office:value-type="string">
            <text:p>Defect</text:p>
          </table:table-cell>
          <table:table-cell office:value-type="string">
            <text:p>MOWER-04: Pull cord jams</text:p>
          </table:table-cell>
          <table:table-cell office:value-type="string">
            <text:p>Starter only turns over in jerks, the cord does not retract smoothly.</text:p>
          </table:table-cell>
          <table:table-cell office:value-type="string">
            <text:p>Medium</text:p>
          </table:table-cell>
          <table:table-cell office:value-type="string">
            <text:p>2026-05-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e Sal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MOWER-04: Annual service 2026</text:p>
          </table:table-cell>
          <table:table-cell office:value-type="string">
            <text:p>Regular service by Honda workshop</text:p>
          </table:table-cell>
          <table:table-cell office:value-type="string">
            <text:p/>
          </table:table-cell>
          <table:table-cell office:value-type="string">
            <text:p>2026-04-01</text:p>
          </table:table-cell>
          <table:table-cell office:value-type="string">
            <text:p>2026-09-01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ANNUAL_SERVICE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PUMP-01</text:p>
          </table:table-cell>
          <table:table-cell office:value-type="string">
            <text:p>Irrigation Pump Block A</text:p>
          </table:table-cell>
          <table:table-cell office:value-type="string">
            <text:p>3100</text:p>
          </table:table-cell>
          <table:table-cell office:value-type="string">
            <text:p>Grundfos</text:p>
          </table:table-cell>
          <table:table-cell office:value-type="string">
            <text:p>CR 5-12</text:p>
          </table:table-cell>
          <table:table-cell office:value-type="string">
            <text:p>GF-CR5-7732</text:p>
          </table:table-cell>
          <table:table-cell office:value-type="string">
            <text:p>InService</text:p>
          </table:table-cell>
          <table:table-cell office:value-type="string">
            <text:p>Block A</text:p>
          </table:table-cell>
          <table:table-cell office:value-type="string">
            <text:p>Feeds bed irrigation Block A</text:p>
          </table:table-cell>
          <table:table-cell office:value-type="string">
            <text:p>Defect</text:p>
          </table:table-cell>
          <table:table-cell office:value-type="string">
            <text:p>PUMP-01: Pump pressure too low</text:p>
          </table:table-cell>
          <table:table-cell office:value-type="string">
            <text:p>Pressure in the irrigation system drops after a few minutes of operation. Check the filter.</text:p>
          </table:table-cell>
          <table:table-cell office:value-type="string">
            <text:p>Medium</text:p>
          </table:table-cell>
          <table:table-cell office:value-type="string">
            <text:p>2026-05-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 See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PUMP-01: Pump service 2026</text:p>
          </table:table-cell>
          <table:table-cell office:value-type="string">
            <text:p>Filter change and pressure check</text:p>
          </table:table-cell>
          <table:table-cell office:value-type="string">
            <text:p/>
          </table:table-cell>
          <table:table-cell office:value-type="string">
            <text:p>2026-03-25</text:p>
          </table:table-cell>
          <table:table-cell office:value-type="string">
            <text:p>2026-10-31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PUMP_SERVICE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PUMP-02</text:p>
          </table:table-cell>
          <table:table-cell office:value-type="string">
            <text:p>Irrigation Pump Block B</text:p>
          </table:table-cell>
          <table:table-cell office:value-type="string">
            <text:p>3100</text:p>
          </table:table-cell>
          <table:table-cell office:value-type="string">
            <text:p>Grundfos</text:p>
          </table:table-cell>
          <table:table-cell office:value-type="string">
            <text:p>CR 10-6</text:p>
          </table:table-cell>
          <table:table-cell office:value-type="string">
            <text:p>GF-CR10-9821</text:p>
          </table:table-cell>
          <table:table-cell office:value-type="string">
            <text:p>InService</text:p>
          </table:table-cell>
          <table:table-cell office:value-type="string">
            <text:p>Block B</text:p>
          </table:table-cell>
          <table:table-cell office:value-type="string">
            <text:p>Feeds drip irrigation Block B (greenhouses)</text:p>
          </table:table-cell>
          <table:table-cell office:value-type="string">
            <text:p>Status</text:p>
          </table:table-cell>
          <table:table-cell office:value-type="string">
            <text:p>PUMP-02: Season start 2026</text:p>
          </table:table-cell>
          <table:table-cell office:value-type="string">
            <text:p>Pump back in service after winter shutdown, pressure OK.</text:p>
          </table:table-cell>
          <table:table-cell office:value-type="string">
            <text:p/>
          </table:table-cell>
          <table:table-cell office:value-type="string">
            <text:p>2026-03-25</text:p>
          </table:table-cell>
          <table:table-cell office:value-type="string">
            <text:p/>
          </table:table-cell>
          <table:table-cell office:value-type="string">
            <text:p>2026-03-25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 See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PUMP-02: Pump service 2026</text:p>
          </table:table-cell>
          <table:table-cell office:value-type="string">
            <text:p>Filter change and pressure check</text:p>
          </table:table-cell>
          <table:table-cell office:value-type="string">
            <text:p/>
          </table:table-cell>
          <table:table-cell office:value-type="string">
            <text:p>2026-03-25</text:p>
          </table:table-cell>
          <table:table-cell office:value-type="string">
            <text:p>2026-10-31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PUMP_SERVICE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PUMP-03</text:p>
          </table:table-cell>
          <table:table-cell office:value-type="string">
            <text:p>Rainwater Sump Pump</text:p>
          </table:table-cell>
          <table:table-cell office:value-type="string">
            <text:p>3100</text:p>
          </table:table-cell>
          <table:table-cell office:value-type="string">
            <text:p>KSB</text:p>
          </table:table-cell>
          <table:table-cell office:value-type="string">
            <text:p>Ama-Drainer N 358</text:p>
          </table:table-cell>
          <table:table-cell office:value-type="string">
            <text:p>KSB-AMA-3344</text:p>
          </table:table-cell>
          <table:table-cell office:value-type="string">
            <text:p>OutOfService</text:p>
          </table:table-cell>
          <table:table-cell office:value-type="string">
            <text:p>Cistern</text:p>
          </table:table-cell>
          <table:table-cell office:value-type="string">
            <text:p>Defective — replacement planned, see open defect report</text:p>
          </table:table-cell>
          <table:table-cell office:value-type="string">
            <text:p>Defect</text:p>
          </table:table-cell>
          <table:table-cell office:value-type="string">
            <text:p>PUMP-03: Pump won't start</text:p>
          </table:table-cell>
          <table:table-cell office:value-type="string">
            <text:p>Motor hums, pump does not spin up. Capacitor likely defective. Sump pump removed, in storage.</text:p>
          </table:table-cell>
          <table:table-cell office:value-type="string">
            <text:p>High</text:p>
          </table:table-cell>
          <table:table-cell office:value-type="string">
            <text:p>2026-04-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 Seed</text:p>
          </table:table-cell>
        </table:table-row>
        <table:table-row>
          <table:table-cell office:value-type="string">
            <text:p>PICKUP-01</text:p>
          </table:table-cell>
          <table:table-cell office:value-type="string">
            <text:p>GardenWorld Pickup #1</text:p>
          </table:table-cell>
          <table:table-cell office:value-type="string">
            <text:p>1100</text:p>
          </table:table-cell>
          <table:table-cell office:value-type="string">
            <text:p>Ford</text:p>
          </table:table-cell>
          <table:table-cell office:value-type="string">
            <text:p>Ranger XL</text:p>
          </table:table-cell>
          <table:table-cell office:value-type="string">
            <text:p>WF0LMFE60PUS00451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Material transport, tow hitch installed</text:p>
          </table:table-cell>
          <table:table-cell office:value-type="string">
            <text:p>Status</text:p>
          </table:table-cell>
          <table:table-cell office:value-type="string">
            <text:p>PICKUP-01: Initial intake</text:p>
          </table:table-cell>
          <table:table-cell office:value-type="string">
            <text:p>New vehicle accepted, key card and papers with dispatch.</text:p>
          </table:table-cell>
          <table:table-cell office:value-type="string">
            <text:p/>
          </table:table-cell>
          <table:table-cell office:value-type="string">
            <text:p>2023-08-10</text:p>
          </table:table-cell>
          <table:table-cell office:value-type="string">
            <text:p/>
          </table:table-cell>
          <table:table-cell office:value-type="string">
            <text:p>2023-08-10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>145</text:p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PICKUP-01: Rear brakes squeal</text:p>
          </table:table-cell>
          <table:table-cell office:value-type="string">
            <text:p>Loud squeal especially in wet weather. Replace brake pads.</text:p>
          </table:table-cell>
          <table:table-cell office:value-type="string">
            <text:p>Medium</text:p>
          </table:table-cell>
          <table:table-cell office:value-type="string">
            <text:p>2026-04-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>48200</text:p>
          </table:table-cell>
          <table:table-cell office:value-type="string">
            <text:p>Joe Sal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PICKUP-01: Tailgate does not close cleanly</text:p>
          </table:table-cell>
          <table:table-cell office:value-type="string">
            <text:p>Tailgate jams when closing, only locks under firm pressure.</text:p>
          </table:table-cell>
          <table:table-cell office:value-type="string">
            <text:p>High</text:p>
          </table:table-cell>
          <table:table-cell office:value-type="string">
            <text:p>2026-05-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>48420</text:p>
          </table:table-cell>
          <table:table-cell office:value-type="string">
            <text:p>Joe Sal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PICKUP-01: Loose trailer plug</text:p>
          </table:table-cell>
          <table:table-cell office:value-type="string">
            <text:p>7-pin plug is wobbly, trailer indicators cut out intermittently.</text:p>
          </table:table-cell>
          <table:table-cell office:value-type="string">
            <text:p>High</text:p>
          </table:table-cell>
          <table:table-cell office:value-type="string">
            <text:p>2026-05-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>48500</text:p>
          </table:table-cell>
          <table:table-cell office:value-type="string">
            <text:p>Carl Bos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PICKUP-01: Weak headlights at night</text:p>
          </table:table-cell>
          <table:table-cell office:value-type="string">
            <text:p>Left low-beam very dim, check bulb or reflector. (Done, bulb replaced.)</text:p>
          </table:table-cell>
          <table:table-cell office:value-type="string">
            <text:p>Low</text:p>
          </table:table-cell>
          <table:table-cell office:value-type="string">
            <text:p>2026-03-12</text:p>
          </table:table-cell>
          <table:table-cell office:value-type="string">
            <text:p/>
          </table:table-cell>
          <table:table-cell office:value-type="string">
            <text:p>2026-03-20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>47210</text:p>
          </table:table-cell>
          <table:table-cell office:value-type="string">
            <text:p>Joe Sal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PICKUP-01: Annual safety inspection 2026</text:p>
          </table:table-cell>
          <table:table-cell office:value-type="string">
            <text:p>Upcoming statutory vehicle inspection</text:p>
          </table:table-cell>
          <table:table-cell office:value-type="string">
            <text:p/>
          </table:table-cell>
          <table:table-cell office:value-type="string">
            <text:p>2026-04-15</text:p>
          </table:table-cell>
          <table:table-cell office:value-type="string">
            <text:p>2026-08-15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PICKUP-02</text:p>
          </table:table-cell>
          <table:table-cell office:value-type="string">
            <text:p>GardenWorld Pickup #2</text:p>
          </table:table-cell>
          <table:table-cell office:value-type="string">
            <text:p>1100</text:p>
          </table:table-cell>
          <table:table-cell office:value-type="string">
            <text:p>Toyota</text:p>
          </table:table-cell>
          <table:table-cell office:value-type="string">
            <text:p>Hilux Double Cab</text:p>
          </table:table-cell>
          <table:table-cell office:value-type="string">
            <text:p>AHTKB3CD901234567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All-wheel drive, double cab, 3.2 t tow hitch</text:p>
          </table:table-cell>
          <table:table-cell office:value-type="string">
            <text:p>Status</text:p>
          </table:table-cell>
          <table:table-cell office:value-type="string">
            <text:p>PICKUP-02: Initial intake</text:p>
          </table:table-cell>
          <table:table-cell office:value-type="string">
            <text:p>Used vehicle accepted, minor stone chips in windshield.</text:p>
          </table:table-cell>
          <table:table-cell office:value-type="string">
            <text:p/>
          </table:table-cell>
          <table:table-cell office:value-type="string">
            <text:p>2024-02-20</text:p>
          </table:table-cell>
          <table:table-cell office:value-type="string">
            <text:p/>
          </table:table-cell>
          <table:table-cell office:value-type="string">
            <text:p>2024-02-20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>34280</text:p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PICKUP-02: A/C doesn't cool</text:p>
          </table:table-cell>
          <table:table-cell office:value-type="string">
            <text:p>Likely lost refrigerant, brief hissing on activation.</text:p>
          </table:table-cell>
          <table:table-cell office:value-type="string">
            <text:p>Medium</text:p>
          </table:table-cell>
          <table:table-cell office:value-type="string">
            <text:p>2026-05-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>36210</text:p>
          </table:table-cell>
          <table:table-cell office:value-type="string">
            <text:p>Joe Sal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PICKUP-02: Annual safety inspection 2026</text:p>
          </table:table-cell>
          <table:table-cell office:value-type="string">
            <text:p>Upcoming statutory vehicle inspection</text:p>
          </table:table-cell>
          <table:table-cell office:value-type="string">
            <text:p/>
          </table:table-cell>
          <table:table-cell office:value-type="string">
            <text:p>2026-04-15</text:p>
          </table:table-cell>
          <table:table-cell office:value-type="string">
            <text:p>2026-10-30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TRAILER-01</text:p>
          </table:table-cell>
          <table:table-cell office:value-type="string">
            <text:p>Equipment Trailer Large</text:p>
          </table:table-cell>
          <table:table-cell office:value-type="string">
            <text:p>1200</text:p>
          </table:table-cell>
          <table:table-cell office:value-type="string">
            <text:p>Humbaur</text:p>
          </table:table-cell>
          <table:table-cell office:value-type="string">
            <text:p>HTK 3500.31</text:p>
          </table:table-cell>
          <table:table-cell office:value-type="string">
            <text:p>WHB-HTK-2020-3331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3.5 t trailer with loading ramp</text:p>
          </table:table-cell>
          <table:table-cell office:value-type="string">
            <text:p>Defect</text:p>
          </table:table-cell>
          <table:table-cell office:value-type="string">
            <text:p>TRAILER-01: Right rear light defective</text:p>
          </table:table-cell>
          <table:table-cell office:value-type="string">
            <text:p>Glass cracked, bulb loose in socket.</text:p>
          </table:table-cell>
          <table:table-cell office:value-type="string">
            <text:p>Low</text:p>
          </table:table-cell>
          <table:table-cell office:value-type="string">
            <text:p>2026-05-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e Sal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TRAILER-01: Annual safety inspection 2026</text:p>
          </table:table-cell>
          <table:table-cell office:value-type="string">
            <text:p>3.5 t trailer — statutory inspection due</text:p>
          </table:table-cell>
          <table:table-cell office:value-type="string">
            <text:p/>
          </table:table-cell>
          <table:table-cell office:value-type="string">
            <text:p>2026-04-15</text:p>
          </table:table-cell>
          <table:table-cell office:value-type="string">
            <text:p>2026-07-20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TRAILER-02</text:p>
          </table:table-cell>
          <table:table-cell office:value-type="string">
            <text:p>Equipment Trailer Small</text:p>
          </table:table-cell>
          <table:table-cell office:value-type="string">
            <text:p>1200</text:p>
          </table:table-cell>
          <table:table-cell office:value-type="string">
            <text:p>Anssems</text:p>
          </table:table-cell>
          <table:table-cell office:value-type="string">
            <text:p>GTB 1500.251</text:p>
          </table:table-cell>
          <table:table-cell office:value-type="string">
            <text:p>ANS-GTB1500-1872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1.5 t trailer for small machines</text:p>
          </table:table-cell>
          <table:table-cell office:value-type="string">
            <text:p>Defect</text:p>
          </table:table-cell>
          <table:table-cell office:value-type="string">
            <text:p>TRAILER-02: Loading ramp warped</text:p>
          </table:table-cell>
          <table:table-cell office:value-type="string">
            <text:p>Left ramp will not latch without using a pry bar.</text:p>
          </table:table-cell>
          <table:table-cell office:value-type="string">
            <text:p>Medium</text:p>
          </table:table-cell>
          <table:table-cell office:value-type="string">
            <text:p>2026-04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 Bos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TRAILER-02: Annual safety inspection 2026</text:p>
          </table:table-cell>
          <table:table-cell office:value-type="string">
            <text:p>1.5 t trailer — statutory inspection due</text:p>
          </table:table-cell>
          <table:table-cell office:value-type="string">
            <text:p/>
          </table:table-cell>
          <table:table-cell office:value-type="string">
            <text:p>2026-04-15</text:p>
          </table:table-cell>
          <table:table-cell office:value-type="string">
            <text:p>2026-11-12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SHED-NORTH</text:p>
          </table:table-cell>
          <table:table-cell office:value-type="string">
            <text:p>Tool Shed North</text:p>
          </table:table-cell>
          <table:table-cell office:value-type="string">
            <text:p>5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Block N</text:p>
          </table:table-cell>
          <table:table-cell office:value-type="string">
            <text:p>Storage for small tools and seed</text:p>
          </table:table-cell>
          <table:table-cell office:value-type="string">
            <text:p>Status</text:p>
          </table:table-cell>
          <table:table-cell office:value-type="string">
            <text:p>SHED-NORTH: Visual check Q1/2026</text:p>
          </table:table-cell>
          <table:table-cell office:value-type="string">
            <text:p>Door closes properly, lighting OK, floor dry.</text:p>
          </table:table-cell>
          <table:table-cell office:value-type="string">
            <text:p/>
          </table:table-cell>
          <table:table-cell office:value-type="string">
            <text:p>2026-03-15</text:p>
          </table:table-cell>
          <table:table-cell office:value-type="string">
            <text:p/>
          </table:table-cell>
          <table:table-cell office:value-type="string">
            <text:p>2026-03-15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 Bos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SHED-NORTH: Fire-safety check 2026</text:p>
          </table:table-cell>
          <table:table-cell office:value-type="string">
            <text:p>Annual visual inspection of fire extinguishers and emergency exits</text:p>
          </table:table-cell>
          <table:table-cell office:value-type="string">
            <text:p/>
          </table:table-cell>
          <table:table-cell office:value-type="string">
            <text:p>2026-03-15</text:p>
          </table:table-cell>
          <table:table-cell office:value-type="string">
            <text:p>2027-03-15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FIREEXT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SHED-SOUTH</text:p>
          </table:table-cell>
          <table:table-cell office:value-type="string">
            <text:p>Tool Shed South</text:p>
          </table:table-cell>
          <table:table-cell office:value-type="string">
            <text:p>5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Block S</text:p>
          </table:table-cell>
          <table:table-cell office:value-type="string">
            <text:p>Storage for irrigation gear and fertiliser</text:p>
          </table:table-cell>
          <table:table-cell office:value-type="string">
            <text:p>Defect</text:p>
          </table:table-cell>
          <table:table-cell office:value-type="string">
            <text:p>SHED-SOUTH: Door lock defective</text:p>
          </table:table-cell>
          <table:table-cell office:value-type="string">
            <text:p>Door can only be secured with a padlock.</text:p>
          </table:table-cell>
          <table:table-cell office:value-type="string">
            <text:p>Medium</text:p>
          </table:table-cell>
          <table:table-cell office:value-type="string">
            <text:p>2026-04-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 See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SHED-SOUTH: Fire-safety check 2026</text:p>
          </table:table-cell>
          <table:table-cell office:value-type="string">
            <text:p>Annual visual inspection of fire extinguishers and emergency exits</text:p>
          </table:table-cell>
          <table:table-cell office:value-type="string">
            <text:p/>
          </table:table-cell>
          <table:table-cell office:value-type="string">
            <text:p>2026-03-15</text:p>
          </table:table-cell>
          <table:table-cell office:value-type="string">
            <text:p>2027-03-15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FIREEXT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SHED-PARK</text:p>
          </table:table-cell>
          <table:table-cell office:value-type="string">
            <text:p>Container City Park</text:p>
          </table:table-cell>
          <table:table-cell office:value-type="string">
            <text:p>5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City Park</text:p>
          </table:table-cell>
          <table:table-cell office:value-type="string">
            <text:p>Mobile storage container for grounds-keeping tool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W-01</text:p>
          </table:table-cell>
          <table:table-cell office:value-type="string">
            <text:p>Chainsaw Large</text:p>
          </table:table-cell>
          <table:table-cell office:value-type="string">
            <text:p>2200</text:p>
          </table:table-cell>
          <table:table-cell office:value-type="string">
            <text:p>STIHL</text:p>
          </table:table-cell>
          <table:table-cell office:value-type="string">
            <text:p>MS 251 C-BE</text:p>
          </table:table-cell>
          <table:table-cell office:value-type="string">
            <text:p>MS251-0445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Branch care, storm damage</text:p>
          </table:table-cell>
          <table:table-cell office:value-type="string">
            <text:p>Defect</text:p>
          </table:table-cell>
          <table:table-cell office:value-type="string">
            <text:p>SAW-01: Chain tension won't hold</text:p>
          </table:table-cell>
          <table:table-cell office:value-type="string">
            <text:p>Tensioning screw no longer grips, chain slackens during use.</text:p>
          </table:table-cell>
          <table:table-cell office:value-type="string">
            <text:p>High</text:p>
          </table:table-cell>
          <table:table-cell office:value-type="string">
            <text:p>2026-05-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 See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SAW-01: Safety check 2026</text:p>
          </table:table-cell>
          <table:table-cell office:value-type="string">
            <text:p>DGUV regulation 3 safety inspection</text:p>
          </table:table-cell>
          <table:table-cell office:value-type="string">
            <text:p/>
          </table:table-cell>
          <table:table-cell office:value-type="string">
            <text:p>2026-04-10</text:p>
          </table:table-cell>
          <table:table-cell office:value-type="string">
            <text:p>2026-09-10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SAW-01: Annual service 2026</text:p>
          </table:table-cell>
          <table:table-cell office:value-type="string">
            <text:p>Regular service by STIHL workshop</text:p>
          </table:table-cell>
          <table:table-cell office:value-type="string">
            <text:p/>
          </table:table-cell>
          <table:table-cell office:value-type="string">
            <text:p>2026-04-10</text:p>
          </table:table-cell>
          <table:table-cell office:value-type="string">
            <text:p>2026-04-20</text:p>
          </table:table-cell>
          <table:table-cell office:value-type="string">
            <text:p>2026-04-20</text:p>
          </table:table-cell>
          <table:table-cell office:value-type="string">
            <text:p>Done</text:p>
          </table:table-cell>
          <table:table-cell office:value-type="string">
            <text:p>ANNUAL_SERVICE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SAW-02</text:p>
          </table:table-cell>
          <table:table-cell office:value-type="string">
            <text:p>Chainsaw Small</text:p>
          </table:table-cell>
          <table:table-cell office:value-type="string">
            <text:p>2200</text:p>
          </table:table-cell>
          <table:table-cell office:value-type="string">
            <text:p>STIHL</text:p>
          </table:table-cell>
          <table:table-cell office:value-type="string">
            <text:p>MSA 220 C-B</text:p>
          </table:table-cell>
          <table:table-cell office:value-type="string">
            <text:p>MSA220-0871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Battery saw for light pruning</text:p>
          </table:table-cell>
          <table:table-cell office:value-type="string">
            <text:p>Defect</text:p>
          </table:table-cell>
          <table:table-cell office:value-type="string">
            <text:p>SAW-02: Battery runtime significantly shorter</text:p>
          </table:table-cell>
          <table:table-cell office:value-type="string">
            <text:p>Battery only lasts about 15 min under load (previously 40 min). Check warranty case.</text:p>
          </table:table-cell>
          <table:table-cell office:value-type="string">
            <text:p>Medium</text:p>
          </table:table-cell>
          <table:table-cell office:value-type="string">
            <text:p>2026-05-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 Bos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SAW-02: Safety check 2026</text:p>
          </table:table-cell>
          <table:table-cell office:value-type="string">
            <text:p>DGUV regulation 3 safety inspection</text:p>
          </table:table-cell>
          <table:table-cell office:value-type="string">
            <text:p/>
          </table:table-cell>
          <table:table-cell office:value-type="string">
            <text:p>2026-04-10</text:p>
          </table:table-cell>
          <table:table-cell office:value-type="string">
            <text:p>2026-09-10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HEDGE-01</text:p>
          </table:table-cell>
          <table:table-cell office:value-type="string">
            <text:p>Hedge Trimmer</text:p>
          </table:table-cell>
          <table:table-cell office:value-type="string">
            <text:p>2200</text:p>
          </table:table-cell>
          <table:table-cell office:value-type="string">
            <text:p>STIHL</text:p>
          </table:table-cell>
          <table:table-cell office:value-type="string">
            <text:p>HSA 130 T</text:p>
          </table:table-cell>
          <table:table-cell office:value-type="string">
            <text:p>HSA130-1188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Battery hedge trimmer with extension pole</text:p>
          </table:table-cell>
          <table:table-cell office:value-type="string">
            <text:p>Defect</text:p>
          </table:table-cell>
          <table:table-cell office:value-type="string">
            <text:p>HEDGE-01: Blades dull</text:p>
          </table:table-cell>
          <table:table-cell office:value-type="string">
            <text:p>Cut quality frayed, blades need sharpening or replacement.</text:p>
          </table:table-cell>
          <table:table-cell office:value-type="string">
            <text:p>Low</text:p>
          </table:table-cell>
          <table:table-cell office:value-type="string">
            <text:p>2026-04-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 See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HEDGE-01: Safety check 2026</text:p>
          </table:table-cell>
          <table:table-cell office:value-type="string">
            <text:p>DGUV regulation 3 safety inspection</text:p>
          </table:table-cell>
          <table:table-cell office:value-type="string">
            <text:p/>
          </table:table-cell>
          <table:table-cell office:value-type="string">
            <text:p>2026-04-10</text:p>
          </table:table-cell>
          <table:table-cell office:value-type="string">
            <text:p>2026-09-10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BLOWER-01</text:p>
          </table:table-cell>
          <table:table-cell office:value-type="string">
            <text:p>Leaf Blower</text:p>
          </table:table-cell>
          <table:table-cell office:value-type="string">
            <text:p>2200</text:p>
          </table:table-cell>
          <table:table-cell office:value-type="string">
            <text:p>STIHL</text:p>
          </table:table-cell>
          <table:table-cell office:value-type="string">
            <text:p>BGA 200</text:p>
          </table:table-cell>
          <table:table-cell office:value-type="string">
            <text:p>BGA200-0277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Battery leaf blower for paths and park areas</text:p>
          </table:table-cell>
          <table:table-cell office:value-type="string">
            <text:p>Defect</text:p>
          </table:table-cell>
          <table:table-cell office:value-type="string">
            <text:p>BLOWER-01: Bearing noise</text:p>
          </table:table-cell>
          <table:table-cell office:value-type="string">
            <text:p>Squealing at start-up, check bearings.</text:p>
          </table:table-cell>
          <table:table-cell office:value-type="string">
            <text:p>Low</text:p>
          </table:table-cell>
          <table:table-cell office:value-type="string">
            <text:p>2026-05-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 See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edule</text:p>
          </table:table-cell>
          <table:table-cell office:value-type="string">
            <text:p>BLOWER-01: Safety check 2026</text:p>
          </table:table-cell>
          <table:table-cell office:value-type="string">
            <text:p>DGUV regulation 3 safety inspection</text:p>
          </table:table-cell>
          <table:table-cell office:value-type="string">
            <text:p/>
          </table:table-cell>
          <table:table-cell office:value-type="string">
            <text:p>2026-04-10</text:p>
          </table:table-cell>
          <table:table-cell office:value-type="string">
            <text:p>2026-09-10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TILLER-01</text:p>
          </table:table-cell>
          <table:table-cell office:value-type="string">
            <text:p>Rotary Tiller</text:p>
          </table:table-cell>
          <table:table-cell office:value-type="string">
            <text:p>2200</text:p>
          </table:table-cell>
          <table:table-cell office:value-type="string">
            <text:p>Honda</text:p>
          </table:table-cell>
          <table:table-cell office:value-type="string">
            <text:p>F220</text:p>
          </table:table-cell>
          <table:table-cell office:value-type="string">
            <text:p>HND-F220-1455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Bed preparation, spring and autumn</text:p>
          </table:table-cell>
          <table:table-cell office:value-type="string">
            <text:p>Schedule</text:p>
          </table:table-cell>
          <table:table-cell office:value-type="string">
            <text:p>TILLER-01: Safety check 2026</text:p>
          </table:table-cell>
          <table:table-cell office:value-type="string">
            <text:p>DGUV regulation 3 safety inspection</text:p>
          </table:table-cell>
          <table:table-cell office:value-type="string">
            <text:p/>
          </table:table-cell>
          <table:table-cell office:value-type="string">
            <text:p>2026-04-10</text:p>
          </table:table-cell>
          <table:table-cell office:value-type="string">
            <text:p>2026-09-10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WELD-01</text:p>
          </table:table-cell>
          <table:table-cell office:value-type="string">
            <text:p>Welder</text:p>
          </table:table-cell>
          <table:table-cell office:value-type="string">
            <text:p>2300</text:p>
          </table:table-cell>
          <table:table-cell office:value-type="string">
            <text:p>ESAB</text:p>
          </table:table-cell>
          <table:table-cell office:value-type="string">
            <text:p>Rebel EMP 215ic</text:p>
          </table:table-cell>
          <table:table-cell office:value-type="string">
            <text:p>ESAB-EMP215-0992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Metal frame and trailer-tailgate repairs</text:p>
          </table:table-cell>
          <table:table-cell office:value-type="string">
            <text:p>Defect</text:p>
          </table:table-cell>
          <table:table-cell office:value-type="string">
            <text:p>WELD-01: Earth clamp defective</text:p>
          </table:table-cell>
          <table:table-cell office:value-type="string">
            <text:p>Earth cable clamp no longer closes properly, unstable arc.</text:p>
          </table:table-cell>
          <table:table-cell office:value-type="string">
            <text:p>Medium</text:p>
          </table:table-cell>
          <table:table-cell office:value-type="string">
            <text:p>2026-05-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 Boss</text:p>
          </table:table-cell>
        </table:table-row>
        <table:table-row>
          <table:table-cell office:value-type="string">
            <text:p>WASH-01</text:p>
          </table:table-cell>
          <table:table-cell office:value-type="string">
            <text:p>Pressure Washer</text:p>
          </table:table-cell>
          <table:table-cell office:value-type="string">
            <text:p>2300</text:p>
          </table:table-cell>
          <table:table-cell office:value-type="string">
            <text:p>Kärcher</text:p>
          </table:table-cell>
          <table:table-cell office:value-type="string">
            <text:p>HD 7/18-4 M</text:p>
          </table:table-cell>
          <table:table-cell office:value-type="string">
            <text:p>KRC-HD718-2104</text:p>
          </table:table-cell>
          <table:table-cell office:value-type="string">
            <text:p>InService</text:p>
          </table:table-cell>
          <table:table-cell office:value-type="string">
            <text:p>Workshop</text:p>
          </table:table-cell>
          <table:table-cell office:value-type="string">
            <text:p>Cleaning vehicles and equipment</text:p>
          </table:table-cell>
          <table:table-cell office:value-type="string">
            <text:p>Defect</text:p>
          </table:table-cell>
          <table:table-cell office:value-type="string">
            <text:p>WASH-01: High-pressure hose porous</text:p>
          </table:table-cell>
          <table:table-cell office:value-type="string">
            <text:p>Hose shows hairline cracks, leaks at full power. Order replacement.</text:p>
          </table:table-cell>
          <table:table-cell office:value-type="string">
            <text:p>High</text:p>
          </table:table-cell>
          <table:table-cell office:value-type="string">
            <text:p>2026-05-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 Boss</text:p>
          </table:table-cell>
        </table:table-row>
      </table:table>
      <table:table table:name="WorkOrder">
        <table:table-column table:number-columns-repeated="19"/>
        <table:table-row>
          <table:table-cell office:value-type="string">
            <text:p>DocumentNo/K</text:p>
          </table:table-cell>
          <table:table-cell office:value-type="string">
            <text:p>Name</text:p>
          </table:table-cell>
          <table:table-cell office:value-type="string">
            <text:p>BXS_Asset_ID[Value]</text:p>
          </table:table-cell>
          <table:table-cell office:value-type="string">
            <text:p>Workshop_ID[Name]</text:p>
          </table:table-cell>
          <table:table-cell office:value-type="string">
            <text:p>Driver_ID[Name]</text:p>
          </table:table-cell>
          <table:table-cell office:value-type="string">
            <text:p>InternalContact_ID[Name]</text:p>
          </table:table-cell>
          <table:table-cell office:value-type="string">
            <text:p>ScheduledDate</text:p>
          </table:table-cell>
          <table:table-cell office:value-type="string">
            <text:p>ActualDate</text:p>
          </table:table-cell>
          <table:table-cell office:value-type="string">
            <text:p>CompletionDate</text:p>
          </table:table-cell>
          <table:table-cell office:value-type="string">
            <text:p>EstimatedCost</text:p>
          </table:table-cell>
          <table:table-cell office:value-type="string">
            <text:p>ActualCost</text:p>
          </table:table-cell>
          <table:table-cell office:value-type="string">
            <text:p>ExternalDocumentNo</text:p>
          </table:table-cell>
          <table:table-cell office:value-type="string">
            <text:p>WorkOrderStatus</text:p>
          </table:table-cell>
          <table:table-cell office:value-type="string">
            <text:p>Description</text:p>
          </table:table-cell>
          <table:table-cell office:value-type="string">
            <text:p>Note</text:p>
          </table:table-cell>
          <table:table-cell office:value-type="string">
            <text:p>BXS_WorkOrder_Item&gt;LineNo/K</text:p>
          </table:table-cell>
          <table:table-cell office:value-type="string">
            <text:p>BXS_WorkOrder_Item&gt;BXS_AssetItem_ID[Name]</text:p>
          </table:table-cell>
          <table:table-cell office:value-type="string">
            <text:p>BXS_WorkOrder_Item&gt;IsResolved</text:p>
          </table:table-cell>
          <table:table-cell office:value-type="string">
            <text:p>BXS_WorkOrder_Item&gt;Note</text:p>
          </table:table-cell>
        </table:table-row>
        <table:table-row>
          <table:table-cell office:value-type="string">
            <text:p>WAU-DEMO-001</text:p>
          </table:table-cell>
          <table:table-cell office:value-type="string">
            <text:p>Major service: safety inspection + tailgate + brakes</text:p>
          </table:table-cell>
          <table:table-cell office:value-type="string">
            <text:p>PICKUP-01</text:p>
          </table:table-cell>
          <table:table-cell office:value-type="string">
            <text:p>Wood, Inc</text:p>
          </table:table-cell>
          <table:table-cell office:value-type="string">
            <text:p>Joe Sales</text:p>
          </table:table-cell>
          <table:table-cell office:value-type="string">
            <text:p>Carl Boss</text:p>
          </table:table-cell>
          <table:table-cell office:value-type="string">
            <text:p>2026-08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4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>Bundle work order for PICKUP-01: safety-inspection prep plus the open defects on tailgate, trailer plug and brakes.</text:p>
          </table:table-cell>
          <table:table-cell office:value-type="string">
            <text:p>Workshop high season — book early.</text:p>
          </table:table-cell>
          <table:table-cell office:value-type="string">
            <text:p>10</text:p>
          </table:table-cell>
          <table:table-cell office:value-type="string">
            <text:p>PICKUP-01: Annual safety inspection 2026</text:p>
          </table:table-cell>
          <table:table-cell office:value-type="string">
            <text:p>Y</text:p>
          </table:table-cell>
          <table:table-cell office:value-type="string">
            <text:p>Safety inspection incl. brake prep.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PICKUP-01: Tailgate does not close cleanly</text:p>
          </table:table-cell>
          <table:table-cell office:value-type="string">
            <text:p>Y</text:p>
          </table:table-cell>
          <table:table-cell office:value-type="string">
            <text:p>Adjust tailgate or replace latch.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PICKUP-01: Loose trailer plug</text:p>
          </table:table-cell>
          <table:table-cell office:value-type="string">
            <text:p>Y</text:p>
          </table:table-cell>
          <table:table-cell office:value-type="string">
            <text:p>Replace plug or solder permanently.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string">
            <text:p>PICKUP-01: Rear brakes squeal</text:p>
          </table:table-cell>
          <table:table-cell office:value-type="string">
            <text:p>Y</text:p>
          </table:table-cell>
          <table:table-cell office:value-type="string">
            <text:p>Renew brake pads.</text:p>
          </table:table-cell>
        </table:table-row>
        <table:table-row>
          <table:table-cell office:value-type="string">
            <text:p>WAU-DEMO-002</text:p>
          </table:table-cell>
          <table:table-cell office:value-type="string">
            <text:p>Mower deck service before peak summer</text:p>
          </table:table-cell>
          <table:table-cell office:value-type="string">
            <text:p>MOWER-02</text:p>
          </table:table-cell>
          <table:table-cell office:value-type="string">
            <text:p>Tree Farm Inc.</text:p>
          </table:table-cell>
          <table:table-cell office:value-type="string">
            <text:p>Henry Seed</text:p>
          </table:table-cell>
          <table:table-cell office:value-type="string">
            <text:p>Carl Boss</text:p>
          </table:table-cell>
          <table:table-cell office:value-type="string">
            <text:p>2026-06-05</text:p>
          </table:table-cell>
          <table:table-cell office:value-type="string">
            <text:p>2026-06-05</text:p>
          </table:table-cell>
          <table:table-cell office:value-type="string">
            <text:p/>
          </table:table-cell>
          <table:table-cell office:value-type="string">
            <text:p>320</text:p>
          </table:table-cell>
          <table:table-cell office:value-type="string">
            <text:p/>
          </table:table-cell>
          <table:table-cell office:value-type="string">
            <text:p>TF-2026-0411</text:p>
          </table:table-cell>
          <table:table-cell office:value-type="string">
            <text:p>Released</text:p>
          </table:table-cell>
          <table:table-cell office:value-type="string">
            <text:p>Blade replacement and belt check before peak season.</text:p>
          </table:table-cell>
          <table:table-cell office:value-type="string">
            <text:p>In the workshop, pickup Friday afternoon.</text:p>
          </table:table-cell>
          <table:table-cell office:value-type="string">
            <text:p>10</text:p>
          </table:table-cell>
          <table:table-cell office:value-type="string">
            <text:p>MOWER-02: Uneven mowing result</text:p>
          </table:table-cell>
          <table:table-cell office:value-type="string">
            <text:p>Y</text:p>
          </table:table-cell>
          <table:table-cell office:value-type="string">
            <text:p>Check blades and belt, re-tension.</text:p>
          </table:table-cell>
        </table:table-row>
        <table:table-row>
          <table:table-cell office:value-type="string">
            <text:p>WAU-DEMO-003</text:p>
          </table:table-cell>
          <table:table-cell office:value-type="string">
            <text:p>Safety check + chain tensioner repair</text:p>
          </table:table-cell>
          <table:table-cell office:value-type="string">
            <text:p>SAW-01</text:p>
          </table:table-cell>
          <table:table-cell office:value-type="string">
            <text:p>Tree Farm Inc.</text:p>
          </table:table-cell>
          <table:table-cell office:value-type="string">
            <text:p>Carl Boss</text:p>
          </table:table-cell>
          <table:table-cell office:value-type="string">
            <text:p>GardenAdmin</text:p>
          </table:table-cell>
          <table:table-cell office:value-type="string">
            <text:p>2026-05-15</text:p>
          </table:table-cell>
          <table:table-cell office:value-type="string">
            <text:p>2026-05-15</text:p>
          </table:table-cell>
          <table:table-cell office:value-type="string">
            <text:p>2026-05-18</text:p>
          </table:table-cell>
          <table:table-cell office:value-type="string">
            <text:p>180</text:p>
          </table:table-cell>
          <table:table-cell office:value-type="string">
            <text:p>215</text:p>
          </table:table-cell>
          <table:table-cell office:value-type="string">
            <text:p>TF-2026-0398</text:p>
          </table:table-cell>
          <table:table-cell office:value-type="string">
            <text:p>Completed</text:p>
          </table:table-cell>
          <table:table-cell office:value-type="string">
            <text:p>Safety check combined with repair of the defective chain tensioner.</text:p>
          </table:table-cell>
          <table:table-cell office:value-type="string">
            <text:p>New safety sticker applied, tensioner mechanism replaced.</text:p>
          </table:table-cell>
          <table:table-cell office:value-type="string">
            <text:p>10</text:p>
          </table:table-cell>
          <table:table-cell office:value-type="string">
            <text:p>SAW-01: Safety check 2026</text:p>
          </table:table-cell>
          <table:table-cell office:value-type="string">
            <text:p>Y</text:p>
          </table:table-cell>
          <table:table-cell office:value-type="string">
            <text:p>DGUV regulation 3, new sticker.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SAW-01: Chain tension won't hold</text:p>
          </table:table-cell>
          <table:table-cell office:value-type="string">
            <text:p>Y</text:p>
          </table:table-cell>
          <table:table-cell office:value-type="string">
            <text:p>Replace tensioner mechanism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2</meta:generator>
  </office:meta>
</office:document-meta>
</file>