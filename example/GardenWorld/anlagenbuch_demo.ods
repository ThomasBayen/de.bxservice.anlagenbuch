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_config">
        <table:table-column table:number-columns-repeated="5"/>
        <table:table-row>
          <table:table-cell office:value-type="string">
            <text:p>Sheet</text:p>
          </table:table-cell>
          <table:table-cell office:value-type="string">
            <text:p>Window</text:p>
          </table:table-cell>
          <table:table-cell office:value-type="string">
            <text:p>Tab</text:p>
          </table:table-cell>
          <table:table-cell office:value-type="string">
            <text:p>ImportMode</text:p>
          </table:table-cell>
          <table:table-cell office:value-type="string">
            <text:p>Skip</text:p>
          </table:table-cell>
        </table:table-row>
        <table:table-row>
          <table:table-cell office:value-type="string">
            <text:p>AssetClass</text:p>
          </table:table-cell>
          <table:table-cell office:value-type="string">
            <text:p>BXS Asset Class</text:p>
          </table:table-cell>
          <table:table-cell office:value-type="string">
            <text:p>BXS Asset Class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ScheduleType</text:p>
          </table:table-cell>
          <table:table-cell office:value-type="string">
            <text:p>BXS Schedule Type</text:p>
          </table:table-cell>
          <table:table-cell office:value-type="string">
            <text:p>BXS Schedule Type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Asset</text:p>
          </table:table-cell>
          <table:table-cell office:value-type="string">
            <text:p>BXS Asset</text:p>
          </table:table-cell>
          <table:table-cell office:value-type="string">
            <text:p>Asset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</table:table>
      <table:table table:name="AssetClass">
        <table:table-column table:number-columns-repeated="4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GW-MOWER</text:p>
          </table:table-cell>
          <table:table-cell office:value-type="string">
            <text:p>Rasenmäher</text:p>
          </table:table-cell>
          <table:table-cell office:value-type="string">
            <text:p>Equipment</text:p>
          </table:table-cell>
          <table:table-cell office:value-type="string">
            <text:p>Aufsitz- und Handrasenmäher</text:p>
          </table:table-cell>
        </table:table-row>
        <table:table-row>
          <table:table-cell office:value-type="string">
            <text:p>GW-IRRIG</text:p>
          </table:table-cell>
          <table:table-cell office:value-type="string">
            <text:p>Bewässerungspumpe</text:p>
          </table:table-cell>
          <table:table-cell office:value-type="string">
            <text:p>Stationary</text:p>
          </table:table-cell>
          <table:table-cell office:value-type="string">
            <text:p>Festinstallierte Pumpe für Bewässerungssysteme</text:p>
          </table:table-cell>
        </table:table-row>
        <table:table-row>
          <table:table-cell office:value-type="string">
            <text:p>GW-PICKUP</text:p>
          </table:table-cell>
          <table:table-cell office:value-type="string">
            <text:p>Pickup</text:p>
          </table:table-cell>
          <table:table-cell office:value-type="string">
            <text:p>Vehicle</text:p>
          </table:table-cell>
          <table:table-cell office:value-type="string">
            <text:p>Pickup-LKW für Materialtransport</text:p>
          </table:table-cell>
        </table:table-row>
        <table:table-row>
          <table:table-cell office:value-type="string">
            <text:p>GW-TRAILER</text:p>
          </table:table-cell>
          <table:table-cell office:value-type="string">
            <text:p>Anhänger</text:p>
          </table:table-cell>
          <table:table-cell office:value-type="string">
            <text:p>Vehicle</text:p>
          </table:table-cell>
          <table:table-cell office:value-type="string">
            <text:p>Geräteanhänger, zulassungspflichtig</text:p>
          </table:table-cell>
        </table:table-row>
        <table:table-row>
          <table:table-cell office:value-type="string">
            <text:p>GW-BLDG</text:p>
          </table:table-cell>
          <table:table-cell office:value-type="string">
            <text:p>Gartenhäuschen</text:p>
          </table:table-cell>
          <table:table-cell office:value-type="string">
            <text:p>Building</text:p>
          </table:table-cell>
          <table:table-cell office:value-type="string">
            <text:p>Gerätehaus, fest verbaut</text:p>
          </table:table-cell>
        </table:table-row>
        <table:table-row>
          <table:table-cell office:value-type="string">
            <text:p>GW-TOOL</text:p>
          </table:table-cell>
          <table:table-cell office:value-type="string">
            <text:p>Motorgerät</text:p>
          </table:table-cell>
          <table:table-cell office:value-type="string">
            <text:p>Equipment</text:p>
          </table:table-cell>
          <table:table-cell office:value-type="string">
            <text:p>Motorbetriebene Werkzeuge (Kettensäge, Heckenschere)</text:p>
          </table:table-cell>
        </table:table-row>
      </table:table>
      <table:table table:name="ScheduleType">
        <table:table-column table:number-columns-repeated="6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DefaultIntervalMonths</text:p>
          </table:table-cell>
          <table:table-cell office:value-type="string">
            <text:p>IsMandatoryDefault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TUV</text:p>
          </table:table-cell>
          <table:table-cell office:value-type="string">
            <text:p>TÜV</text:p>
          </table:table-cell>
          <table:table-cell office:value-type="string">
            <text:p/>
          </table:table-cell>
          <table:table-cell office:value-type="string">
            <text:p>24</text:p>
          </table:table-cell>
          <table:table-cell office:value-type="string">
            <text:p>Y</text:p>
          </table:table-cell>
          <table:table-cell office:value-type="string">
            <text:p>Hauptuntersuchung gem. §29 StVZO (Pickup, Anhänger) — Klasse leer, manuell zuordnen</text:p>
          </table:table-cell>
        </table:table-row>
        <table:table-row>
          <table:table-cell office:value-type="string">
            <text:p>ANNUAL_SERVICE</text:p>
          </table:table-cell>
          <table:table-cell office:value-type="string">
            <text:p>Jahresinspektion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N</text:p>
          </table:table-cell>
          <table:table-cell office:value-type="string">
            <text:p>Reguläre Hersteller-Wartung (Mäher, Pumpe, Motorgerät)</text:p>
          </table:table-cell>
        </table:table-row>
        <table:table-row>
          <table:table-cell office:value-type="string">
            <text:p>SAFETY</text:p>
          </table:table-cell>
          <table:table-cell office:value-type="string">
            <text:p>UVV-Prüfung</text:p>
          </table:table-cell>
          <table:table-cell office:value-type="string">
            <text:p>GW-TOOL</text:p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Unfallverhütungsvorschrift-Prüfung für motorbetriebene Werkzeuge</text:p>
          </table:table-cell>
        </table:table-row>
      </table:table>
      <table:table table:name="Asset">
        <table:table-column table:number-columns-repeated="20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Manufacturer</text:p>
          </table:table-cell>
          <table:table-cell office:value-type="string">
            <text:p>Model</text:p>
          </table:table-cell>
          <table:table-cell office:value-type="string">
            <text:p>SerialNo</text:p>
          </table:table-cell>
          <table:table-cell office:value-type="string">
            <text:p>AssetStatus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BXS_AssetItem&gt;Type/K</text:p>
          </table:table-cell>
          <table:table-cell office:value-type="string">
            <text:p>BXS_AssetItem&gt;Name/K</text:p>
          </table:table-cell>
          <table:table-cell office:value-type="string">
            <text:p>BXS_AssetItem&gt;Description</text:p>
          </table:table-cell>
          <table:table-cell office:value-type="string">
            <text:p>BXS_AssetItem&gt;Priority</text:p>
          </table:table-cell>
          <table:table-cell office:value-type="string">
            <text:p>BXS_AssetItem&gt;ReportedDate</text:p>
          </table:table-cell>
          <table:table-cell office:value-type="string">
            <text:p>BXS_AssetItem&gt;DueDate</text:p>
          </table:table-cell>
          <table:table-cell office:value-type="string">
            <text:p>BXS_AssetItem&gt;CompletionDate</text:p>
          </table:table-cell>
          <table:table-cell office:value-type="string">
            <text:p>BXS_AssetItem&gt;ItemStatus</text:p>
          </table:table-cell>
          <table:table-cell office:value-type="string">
            <text:p>BXS_AssetItem&gt;BXS_ScheduleType_ID[Value]</text:p>
          </table:table-cell>
          <table:table-cell office:value-type="string">
            <text:p>BXS_AssetItem&gt;MeterReading</text:p>
          </table:table-cell>
          <table:table-cell office:value-type="string">
            <text:p>BXS_AssetItem&gt;AD_User_ID[Name]</text:p>
          </table:table-cell>
        </table:table-row>
        <table:table-row>
          <table:table-cell office:value-type="string">
            <text:p>MOWER-01</text:p>
          </table:table-cell>
          <table:table-cell office:value-type="string">
            <text:p>Aufsitzmäher Nord</text:p>
          </table:table-cell>
          <table:table-cell office:value-type="string">
            <text:p>GW-MOWER</text:p>
          </table:table-cell>
          <table:table-cell office:value-type="string">
            <text:p>John Deere</text:p>
          </table:table-cell>
          <table:table-cell office:value-type="string">
            <text:p>X350</text:p>
          </table:table-cell>
          <table:table-cell office:value-type="string">
            <text:p>JD-X350-0142</text:p>
          </table:table-cell>
          <table:table-cell office:value-type="string">
            <text:p>InService</text:p>
          </table:table-cell>
          <table:table-cell office:value-type="string">
            <text:p>Hauptgelände</text:p>
          </table:table-cell>
          <table:table-cell office:value-type="string">
            <text:p>Pflege der Wiesenflächen nördlich der HQ</text:p>
          </table:table-cell>
          <table:table-cell office:value-type="string">
            <text:p>Defect</text:p>
          </table:table-cell>
          <table:table-cell office:value-type="string">
            <text:p>Mähwerk hebt nicht an</text:p>
          </table:table-cell>
          <table:table-cell office:value-type="string">
            <text:p>Hydraulik des Mähdecks reagiert nicht beim Anheben. Vermutlich Hydraulikleitung verstopft.</text:p>
          </table:table-cell>
          <table:table-cell office:value-type="string">
            <text:p>High</text:p>
          </table:table-cell>
          <table:table-cell office:value-type="string">
            <text:p>2026-05-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MOWER-02</text:p>
          </table:table-cell>
          <table:table-cell office:value-type="string">
            <text:p>Aufsitzmäher Süd</text:p>
          </table:table-cell>
          <table:table-cell office:value-type="string">
            <text:p>GW-MOWER</text:p>
          </table:table-cell>
          <table:table-cell office:value-type="string">
            <text:p>Husqvarna</text:p>
          </table:table-cell>
          <table:table-cell office:value-type="string">
            <text:p>R420 TS AWD</text:p>
          </table:table-cell>
          <table:table-cell office:value-type="string">
            <text:p>HQV-R420-0089</text:p>
          </table:table-cell>
          <table:table-cell office:value-type="string">
            <text:p>InService</text:p>
          </table:table-cell>
          <table:table-cell office:value-type="string">
            <text:p>Hauptgelände</text:p>
          </table:table-cell>
          <table:table-cell office:value-type="string">
            <text:p>Pflege der Hangflächen Süd</text:p>
          </table:table-cell>
          <table:table-cell office:value-type="string">
            <text:p>Status</text:p>
          </table:table-cell>
          <table:table-cell office:value-type="string">
            <text:p>Erstaufnahme</text:p>
          </table:table-cell>
          <table:table-cell office:value-type="string">
            <text:p>Mäher in Bestand übernommen, Betriebsstunden notiert.</text:p>
          </table:table-cell>
          <table:table-cell office:value-type="string">
            <text:p/>
          </table:table-cell>
          <table:table-cell office:value-type="string">
            <text:p>2026-04-01</text:p>
          </table:table-cell>
          <table:table-cell office:value-type="string">
            <text:p/>
          </table:table-cell>
          <table:table-cell office:value-type="string">
            <text:p>2026-04-01</text:p>
          </table:table-cell>
          <table:table-cell office:value-type="string">
            <text:p>Done</text:p>
          </table:table-cell>
          <table:table-cell office:value-type="string">
            <text:p/>
          </table:table-cell>
          <table:table-cell office:value-type="string">
            <text:p>120</text:p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UMP-01</text:p>
          </table:table-cell>
          <table:table-cell office:value-type="string">
            <text:p>Bewässerungspumpe Block A</text:p>
          </table:table-cell>
          <table:table-cell office:value-type="string">
            <text:p>GW-IRRIG</text:p>
          </table:table-cell>
          <table:table-cell office:value-type="string">
            <text:p>Grundfos</text:p>
          </table:table-cell>
          <table:table-cell office:value-type="string">
            <text:p>CR 5-12</text:p>
          </table:table-cell>
          <table:table-cell office:value-type="string">
            <text:p>GF-CR5-7732</text:p>
          </table:table-cell>
          <table:table-cell office:value-type="string">
            <text:p>InService</text:p>
          </table:table-cell>
          <table:table-cell office:value-type="string">
            <text:p>Block A</text:p>
          </table:table-cell>
          <table:table-cell office:value-type="string">
            <text:p>Versorgt Beetbewässerung Block A</text:p>
          </table:table-cell>
          <table:table-cell office:value-type="string">
            <text:p>Defect</text:p>
          </table:table-cell>
          <table:table-cell office:value-type="string">
            <text:p>Pumpendruck zu niedrig</text:p>
          </table:table-cell>
          <table:table-cell office:value-type="string">
            <text:p>Druck im Bewässerungssystem fällt nach wenigen Minuten Betrieb ab. Filter prüfen.</text:p>
          </table:table-cell>
          <table:table-cell office:value-type="string">
            <text:p>Medium</text:p>
          </table:table-cell>
          <table:table-cell office:value-type="string">
            <text:p>2026-05-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PICKUP-01</text:p>
          </table:table-cell>
          <table:table-cell office:value-type="string">
            <text:p>GardenWorld Pickup</text:p>
          </table:table-cell>
          <table:table-cell office:value-type="string">
            <text:p>GW-PICKUP</text:p>
          </table:table-cell>
          <table:table-cell office:value-type="string">
            <text:p>Ford</text:p>
          </table:table-cell>
          <table:table-cell office:value-type="string">
            <text:p>Ranger XL</text:p>
          </table:table-cell>
          <table:table-cell office:value-type="string">
            <text:p>WF0LMFE60PUS00451</text:p>
          </table:table-cell>
          <table:table-cell office:value-type="string">
            <text:p>InService</text:p>
          </table:table-cell>
          <table:table-cell office:value-type="string">
            <text:p>Werkstatt</text:p>
          </table:table-cell>
          <table:table-cell office:value-type="string">
            <text:p>Materialtransport, Anhängerkupplung verbaut</text:p>
          </table:table-cell>
          <table:table-cell office:value-type="string">
            <text:p>Schedule</text:p>
          </table:table-cell>
          <table:table-cell office:value-type="string">
            <text:p>TÜV-Hauptuntersuchung</text:p>
          </table:table-cell>
          <table:table-cell office:value-type="string">
            <text:p>Nächste fällige Hauptuntersuchung</text:p>
          </table:table-cell>
          <table:table-cell office:value-type="string">
            <text:p/>
          </table:table-cell>
          <table:table-cell office:value-type="string">
            <text:p>2026-04-15</text:p>
          </table:table-cell>
          <table:table-cell office:value-type="string">
            <text:p>2026-08-15</text:p>
          </table:table-cell>
          <table:table-cell office:value-type="string">
            <text:p/>
          </table:table-cell>
          <table:table-cell office:value-type="string">
            <text:p>Open</text:p>
          </table:table-cell>
          <table:table-cell office:value-type="string">
            <text:p>TUV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  <table:table-row>
          <table:table-cell office:value-type="string">
            <text:p>TRAILER-01</text:p>
          </table:table-cell>
          <table:table-cell office:value-type="string">
            <text:p>Geräteanhänger</text:p>
          </table:table-cell>
          <table:table-cell office:value-type="string">
            <text:p>GW-TRAILER</text:p>
          </table:table-cell>
          <table:table-cell office:value-type="string">
            <text:p>Humbaur</text:p>
          </table:table-cell>
          <table:table-cell office:value-type="string">
            <text:p>HTK 3500.31</text:p>
          </table:table-cell>
          <table:table-cell office:value-type="string">
            <text:p>WHB-HTK-2020-3331</text:p>
          </table:table-cell>
          <table:table-cell office:value-type="string">
            <text:p>InService</text:p>
          </table:table-cell>
          <table:table-cell office:value-type="string">
            <text:p>Werkstatt</text:p>
          </table:table-cell>
          <table:table-cell office:value-type="string">
            <text:p>Anhänger 3,5t, Auffahrra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ED-NORTH</text:p>
          </table:table-cell>
          <table:table-cell office:value-type="string">
            <text:p>Gerätehäuschen Nord</text:p>
          </table:table-cell>
          <table:table-cell office:value-type="string">
            <text:p>GW-BLD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Block N</text:p>
          </table:table-cell>
          <table:table-cell office:value-type="string">
            <text:p>Lagerung Kleingeräte und Saatgu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W-01</text:p>
          </table:table-cell>
          <table:table-cell office:value-type="string">
            <text:p>Kettensäge</text:p>
          </table:table-cell>
          <table:table-cell office:value-type="string">
            <text:p>GW-TOOL</text:p>
          </table:table-cell>
          <table:table-cell office:value-type="string">
            <text:p>STIHL</text:p>
          </table:table-cell>
          <table:table-cell office:value-type="string">
            <text:p>MS 251 C-BE</text:p>
          </table:table-cell>
          <table:table-cell office:value-type="string">
            <text:p>MS251-0445</text:p>
          </table:table-cell>
          <table:table-cell office:value-type="string">
            <text:p>InService</text:p>
          </table:table-cell>
          <table:table-cell office:value-type="string">
            <text:p>Werkstatt</text:p>
          </table:table-cell>
          <table:table-cell office:value-type="string">
            <text:p>Astpflege, Sturmschäden</text:p>
          </table:table-cell>
          <table:table-cell office:value-type="string">
            <text:p>Schedule</text:p>
          </table:table-cell>
          <table:table-cell office:value-type="string">
            <text:p>Jahresinspektion 2026</text:p>
          </table:table-cell>
          <table:table-cell office:value-type="string">
            <text:p>Reguläre Inspektion durch STIHL-Werkstatt</text:p>
          </table:table-cell>
          <table:table-cell office:value-type="string">
            <text:p/>
          </table:table-cell>
          <table:table-cell office:value-type="string">
            <text:p>2026-04-10</text:p>
          </table:table-cell>
          <table:table-cell office:value-type="string">
            <text:p>2026-04-20</text:p>
          </table:table-cell>
          <table:table-cell office:value-type="string">
            <text:p>2026-04-20</text:p>
          </table:table-cell>
          <table:table-cell office:value-type="string">
            <text:p>Done</text:p>
          </table:table-cell>
          <table:table-cell office:value-type="string">
            <text:p>ANNUAL_SERVICE</text:p>
          </table:table-cell>
          <table:table-cell office:value-type="string">
            <text:p/>
          </table:table-cell>
          <table:table-cell office:value-type="string">
            <text:p>GardenAdm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2</meta:generator>
  </office:meta>
</office:document-meta>
</file>